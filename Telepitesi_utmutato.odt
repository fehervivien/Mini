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00bf7a2" officeooo:paragraph-rsid="000bf7a2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 programozási nyelv telepítésének útmutatója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30T19:48:14.275833353</dc:date>
    <meta:editing-duration>PT4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5" meta:character-count="48" meta:non-whitespace-character-count="44"/>
  </office:meta>
</office:document-meta>
</file>