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D0000007D070071AD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áblázat1" style:family="table">
      <style:table-properties style:width="13.257cm" table:align="left"/>
    </style:style>
    <style:style style:name="Táblázat1.A" style:family="table-column">
      <style:table-column-properties style:column-width="3.695cm"/>
    </style:style>
    <style:style style:name="Táblázat1.B" style:family="table-column">
      <style:table-column-properties style:column-width="5.964cm"/>
    </style:style>
    <style:style style:name="Táblázat1.C" style:family="table-column">
      <style:table-column-properties style:column-width="3.598cm"/>
    </style:style>
    <style:style style:name="Táblázat1.A1" style:family="table-cell">
      <style:table-cell-properties style:vertical-align="middle" fo:padding="0.049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orizontal_20_Line">
      <style:paragraph-properties fo:line-height="150%"/>
      <style:text-properties style:font-name="Liberation Serif"/>
    </style:style>
    <style:style style:name="P3" style:family="paragraph" style:parent-style-name="Heading_20_2">
      <style:paragraph-properties fo:line-height="150%" fo:text-align="center" style:justify-single-word="false" fo:break-before="page"/>
      <style:text-properties style:font-name="Liberation Serif"/>
    </style:style>
    <style:style style:name="P4" style:family="paragraph" style:parent-style-name="Heading_20_3">
      <style:paragraph-properties fo:line-height="150%"/>
      <style:text-properties style:font-name="Liberation Serif"/>
    </style:style>
    <style:style style:name="P5" style:family="paragraph" style:parent-style-name="Heading_20_3">
      <style:paragraph-properties fo:line-height="150%"/>
      <style:text-properties style:font-name="Liberation Serif" officeooo:paragraph-rsid="0021d84c"/>
    </style:style>
    <style:style style:name="P6" style:family="paragraph" style:parent-style-name="Text_20_body">
      <style:paragraph-properties fo:line-height="150%"/>
      <style:text-properties style:font-name="Liberation Serif" officeooo:paragraph-rsid="0021d84c"/>
    </style:style>
    <style:style style:name="P7" style:family="paragraph" style:parent-style-name="Heading_20_4">
      <style:paragraph-properties fo:line-height="150%"/>
      <style:text-properties style:font-name="Liberation Serif"/>
    </style:style>
    <style:style style:name="P8" style:family="paragraph" style:parent-style-name="Preformatted_20_Text">
      <style:paragraph-properties fo:line-height="150%"/>
      <style:text-properties style:font-name="Liberation Serif"/>
    </style:style>
    <style:style style:name="P9" style:family="paragraph" style:parent-style-name="Text_20_body">
      <style:paragraph-properties fo:line-height="150%"/>
      <style:text-properties style:font-name="Liberation Serif"/>
    </style:style>
    <style:style style:name="P10" style:family="paragraph" style:parent-style-name="Heading_20_2">
      <style:paragraph-properties fo:margin-left="0cm" fo:margin-right="0cm" fo:margin-top="0cm" fo:margin-bottom="0.247cm" style:contextual-spacing="false" fo:line-height="150%" fo:text-indent="0cm" style:auto-text-indent="false" fo:padding="0cm" fo:border="none"/>
      <style:text-properties style:font-name="Liberation Serif" fo:font-size="14pt" style:font-size-asian="14pt" style:font-size-complex="14pt"/>
    </style:style>
    <style:style style:name="P11" style:family="paragraph" style:parent-style-name="Heading_20_2">
      <style:paragraph-properties fo:margin-left="0cm" fo:margin-right="0cm" fo:margin-top="0cm" fo:margin-bottom="0.247cm" style:contextual-spacing="false" fo:line-height="150%" fo:text-indent="0cm" style:auto-text-indent="false" fo:padding="0cm" fo:border="none" fo:keep-with-next="always"/>
      <style:text-properties style:font-name="Liberation Serif" fo:font-size="14pt" style:font-size-asian="14pt" style:font-size-complex="14pt"/>
    </style:style>
    <style:style style:name="P12" style:family="paragraph" style:parent-style-name="Heading_20_3">
      <style:paragraph-properties fo:margin-left="0cm" fo:margin-right="0cm" fo:margin-top="0cm" fo:margin-bottom="0.247cm" style:contextual-spacing="false" fo:line-height="150%" fo:text-indent="0cm" style:auto-text-indent="false"/>
      <style:text-properties style:font-name="Liberation Serif" fo:font-size="12pt" style:font-size-asian="12pt" style:font-size-complex="12pt"/>
    </style:style>
    <style:style style:name="P13" style:family="paragraph" style:parent-style-name="Heading_20_4">
      <style:paragraph-properties fo:margin-left="0cm" fo:margin-right="0cm" fo:margin-top="0cm" fo:margin-bottom="0.247cm" style:contextual-spacing="false" fo:line-height="150%" fo:text-indent="0cm" style:auto-text-indent="false"/>
      <style:text-properties style:font-name="Liberation Serif" fo:font-size="12pt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.247cm" style:contextual-spacing="false" fo:line-height="150%" fo:text-indent="0cm" style:auto-text-indent="false"/>
      <style:text-properties style:font-name="Liberation Serif" fo:font-size="12pt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.247cm" style:contextual-spacing="false" fo:line-height="150%" fo:text-indent="0cm" style:auto-text-indent="false" fo:padding="0cm" fo:border="none"/>
      <style:text-properties style:font-name="Liberation Serif" fo:font-size="12pt" style:font-size-asian="12pt" style:font-size-complex="12pt"/>
    </style:style>
    <style:style style:name="P16" style:family="paragraph" style:parent-style-name="Text_20_body">
      <style:paragraph-properties fo:margin-left="0cm" fo:margin-right="0cm" fo:line-height="150%" fo:text-indent="0cm" style:auto-text-indent="false"/>
      <style:text-properties style:font-name="Liberation Serif" fo:font-size="12pt" style:font-size-asian="12pt" style:font-size-complex="12pt"/>
    </style:style>
    <style:style style:name="P17" style:family="paragraph" style:parent-style-name="Heading_20_3">
      <style:paragraph-properties fo:line-height="150%"/>
      <style:text-properties style:font-name="Liberation Serif" fo:font-size="12pt" style:font-size-asian="12pt" style:font-size-complex="12pt"/>
    </style:style>
    <style:style style:name="P18" style:family="paragraph" style:parent-style-name="Heading_20_4">
      <style:paragraph-properties fo:line-height="150%"/>
      <style:text-properties style:font-name="Liberation Serif" fo:font-size="12pt" style:font-size-asian="12pt" style:font-size-complex="12pt"/>
    </style:style>
    <style:style style:name="P19" style:family="paragraph" style:parent-style-name="Text_20_body">
      <style:paragraph-properties fo:line-height="150%"/>
      <style:text-properties style:font-name="Liberation Serif" fo:font-size="12pt" style:font-size-asian="12pt" style:font-size-complex="12pt"/>
    </style:style>
    <style:style style:name="P20" style:family="paragraph" style:parent-style-name="Text_20_body">
      <style:paragraph-properties fo:line-height="150%"/>
      <style:text-properties style:font-name="Liberation Serif" fo:font-size="12pt" officeooo:rsid="007756d1" officeooo:paragraph-rsid="007756d1" style:font-size-asian="12pt" style:font-size-complex="12pt"/>
    </style:style>
    <style:style style:name="P21" style:family="paragraph" style:parent-style-name="Text_20_body">
      <style:paragraph-properties fo:margin-left="0cm" fo:margin-right="0cm" fo:margin-top="0cm" fo:margin-bottom="0.247cm" style:contextual-spacing="false" fo:line-height="150%" fo:text-indent="0cm" style:auto-text-indent="false"/>
      <style:text-properties style:font-name="Liberation Serif" fo:font-size="12pt" fo:font-weight="bold" style:font-size-asian="12pt" style:font-size-complex="12pt"/>
    </style:style>
    <style:style style:name="P22" style:family="paragraph" style:parent-style-name="Text_20_body">
      <style:paragraph-properties fo:line-height="150%"/>
      <style:text-properties style:font-name="Liberation Serif" fo:font-size="12pt" fo:font-weight="bold" style:font-size-asian="12pt" style:font-size-complex="12pt"/>
    </style:style>
    <style:style style:name="P23" style:family="paragraph" style:parent-style-name="Text_20_body">
      <style:paragraph-properties fo:line-height="150%"/>
      <style:text-properties style:font-name="Liberation Serif" style:text-underline-style="solid" style:text-underline-width="auto" style:text-underline-color="font-color"/>
    </style:style>
    <style:style style:name="P2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Preformatted_20_Text">
      <style:paragraph-properties fo:margin-left="0cm" fo:margin-right="0cm" fo:line-height="150%" fo:text-indent="0cm" style:auto-text-indent="false"/>
    </style:style>
    <style:style style:name="P29" style:family="paragraph" style:parent-style-name="Preformatted_20_Text">
      <style:paragraph-properties fo:margin-left="0cm" fo:margin-right="0cm" fo:margin-top="0cm" fo:margin-bottom="0cm" style:contextual-spacing="false" fo:line-height="150%" fo:text-indent="0cm" style:auto-text-indent="false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fo:line-height="150%" fo:text-indent="0cm" style:auto-text-indent="false"/>
    </style:style>
    <style:style style:name="P31" style:family="paragraph" style:parent-style-name="Table_20_Contents">
      <style:paragraph-properties fo:margin-left="0cm" fo:margin-right="0cm" fo:margin-top="0cm" fo:margin-bottom="0.247cm" style:contextual-spacing="false" fo:line-height="150%" fo:text-indent="0cm" style:auto-text-indent="false"/>
    </style:style>
    <style:style style:name="P32" style:family="paragraph" style:parent-style-name="Text_20_body">
      <style:paragraph-properties fo:margin-left="0cm" fo:margin-right="0cm" fo:margin-top="0cm" fo:margin-bottom="0.247cm" style:contextual-spacing="false" fo:line-height="150%" fo:text-indent="0cm" style:auto-text-indent="false"/>
    </style:style>
    <style:style style:name="P33" style:family="paragraph" style:parent-style-name="Preformatted_20_Text">
      <style:paragraph-properties fo:line-height="150%"/>
    </style:style>
    <style:style style:name="P34" style:family="paragraph" style:parent-style-name="Preformatted_20_Text">
      <style:paragraph-properties fo:margin-top="0cm" fo:margin-bottom="0.499cm" style:contextual-spacing="false" fo:line-height="150%"/>
    </style:style>
    <style:style style:name="P35" style:family="paragraph" style:parent-style-name="Preformatted_20_Text">
      <style:paragraph-properties fo:margin-top="0cm" fo:margin-bottom="0cm" style:contextual-spacing="false" fo:line-height="150%"/>
    </style:style>
    <style:style style:name="P36" style:family="paragraph" style:parent-style-name="Standard">
      <style:paragraph-properties fo:line-height="150%"/>
    </style:style>
    <style:style style:name="P37" style:family="paragraph" style:parent-style-name="Text_20_body">
      <style:paragraph-properties fo:line-height="150%"/>
    </style:style>
    <style:style style:name="P38" style:family="paragraph" style:parent-style-name="Text_20_body">
      <style:paragraph-properties fo:line-height="150%"/>
      <style:text-properties officeooo:paragraph-rsid="0036c3b0"/>
    </style:style>
    <style:style style:name="P39" style:family="paragraph" style:parent-style-name="Text_20_body">
      <style:paragraph-properties fo:margin-left="0cm" fo:margin-right="0cm" fo:margin-top="0cm" fo:margin-bottom="0.247cm" style:contextual-spacing="false" fo:line-height="150%" fo:text-indent="0cm" style:auto-text-indent="false"/>
      <style:text-properties officeooo:paragraph-rsid="00616a16"/>
    </style:style>
    <style:style style:name="P40" style:family="paragraph" style:parent-style-name="Text_20_body">
      <style:text-properties officeooo:rsid="007188c9" officeooo:paragraph-rsid="007188c9"/>
    </style:style>
    <style:style style:name="P41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42" style:family="paragraph" style:parent-style-name="Preformatted_20_Text" style:list-style-name="L2">
      <style:paragraph-properties fo:margin-left="0cm" fo:margin-right="0cm" fo:line-height="150%" fo:text-indent="0cm" style:auto-text-indent="false"/>
    </style:style>
    <style:style style:name="P43" style:family="paragraph" style:parent-style-name="Preformatted_20_Text" style:list-style-name="L2">
      <style:paragraph-properties fo:line-height="150%"/>
    </style:style>
    <style:style style:name="P44" style:family="paragraph" style:parent-style-name="Preformatted_20_Text" style:list-style-name="L2">
      <style:paragraph-properties fo:margin-top="0cm" fo:margin-bottom="0.499cm" style:contextual-spacing="false" fo:line-height="150%"/>
    </style:style>
    <style:style style:name="P45" style:family="paragraph" style:parent-style-name="Preformatted_20_Text" style:list-style-name="L5">
      <style:paragraph-properties fo:margin-left="0cm" fo:margin-right="0cm" fo:line-height="150%" fo:text-indent="0cm" style:auto-text-indent="false"/>
    </style:style>
    <style:style style:name="P46" style:family="paragraph" style:parent-style-name="Preformatted_20_Text" style:list-style-name="L5">
      <style:paragraph-properties fo:margin-top="0cm" fo:margin-bottom="0.499cm" style:contextual-spacing="false" fo:line-height="150%"/>
    </style:style>
    <style:style style:name="P47" style:family="paragraph" style:parent-style-name="Preformatted_20_Text" style:list-style-name="L6">
      <style:paragraph-properties fo:line-height="150%"/>
    </style:style>
    <style:style style:name="P48" style:family="paragraph" style:parent-style-name="Preformatted_20_Text" style:list-style-name="L6">
      <style:paragraph-properties fo:margin-top="0cm" fo:margin-bottom="0.499cm" style:contextual-spacing="false" fo:line-height="150%"/>
    </style:style>
    <style:style style:name="P49" style:family="paragraph" style:parent-style-name="Preformatted_20_Text" style:list-style-name="L7">
      <style:paragraph-properties fo:line-height="150%"/>
    </style:style>
    <style:style style:name="P50" style:family="paragraph" style:parent-style-name="Preformatted_20_Text" style:list-style-name="L7">
      <style:paragraph-properties fo:margin-top="0cm" fo:margin-bottom="0.499cm" style:contextual-spacing="false" fo:line-height="150%"/>
    </style:style>
    <style:style style:name="P51" style:family="paragraph" style:parent-style-name="Text_20_body" style:list-style-name="L1">
      <style:paragraph-properties fo:line-height="150%"/>
    </style:style>
    <style:style style:name="P52" style:family="paragraph" style:parent-style-name="Text_20_body" style:list-style-name="L2">
      <style:paragraph-properties fo:line-height="150%"/>
    </style:style>
    <style:style style:name="P53" style:family="paragraph" style:parent-style-name="Text_20_body" style:list-style-name="L4">
      <style:paragraph-properties fo:line-height="150%"/>
    </style:style>
    <style:style style:name="P54" style:family="paragraph" style:parent-style-name="Text_20_body" style:list-style-name="L5">
      <style:paragraph-properties fo:line-height="150%"/>
    </style:style>
    <style:style style:name="P55" style:family="paragraph" style:parent-style-name="Text_20_body" style:list-style-name="L6">
      <style:paragraph-properties fo:line-height="150%"/>
    </style:style>
    <style:style style:name="P56" style:family="paragraph" style:parent-style-name="Text_20_body" style:list-style-name="L7">
      <style:paragraph-properties fo:line-height="150%"/>
    </style:style>
    <style:style style:name="P57" style:family="paragraph" style:parent-style-name="Text_20_body" style:list-style-name="L8">
      <style:paragraph-properties fo:line-height="150%"/>
    </style:style>
    <style:style style:name="P58" style:family="paragraph" style:parent-style-name="Text_20_body" style:list-style-name="L9">
      <style:paragraph-properties fo:line-height="150%"/>
    </style:style>
    <style:style style:name="P59" style:family="paragraph" style:parent-style-name="Text_20_body" style:list-style-name="L10">
      <style:paragraph-properties fo:line-height="150%"/>
    </style:style>
    <style:style style:name="P60" style:family="paragraph" style:parent-style-name="Text_20_body" style:list-style-name="L11">
      <style:paragraph-properties fo:line-height="150%"/>
    </style:style>
    <style:style style:name="P61" style:family="paragraph" style:parent-style-name="Text_20_body" style:list-style-name="L12">
      <style:paragraph-properties fo:line-height="150%"/>
    </style:style>
    <style:style style:name="P62" style:family="paragraph" style:parent-style-name="Text_20_body" style:list-style-name="L13">
      <style:paragraph-properties fo:line-height="150%"/>
    </style:style>
    <style:style style:name="P63" style:family="paragraph" style:parent-style-name="Text_20_body" style:list-style-name="L14">
      <style:paragraph-properties fo:margin-left="0cm" fo:margin-right="0cm" fo:margin-top="0cm" fo:margin-bottom="0.247cm" style:contextual-spacing="false" fo:line-height="150%" fo:text-indent="0cm" style:auto-text-indent="false" fo:padding="0cm" fo:border="none"/>
    </style:style>
    <style:style style:name="P64" style:family="paragraph" style:parent-style-name="Text_20_body" style:list-style-name="L15">
      <style:paragraph-properties fo:margin-left="0cm" fo:margin-right="0cm" fo:margin-top="0cm" fo:margin-bottom="0.247cm" style:contextual-spacing="false" fo:line-height="150%" fo:text-indent="0cm" style:auto-text-indent="false" fo:padding="0cm" fo:border="none"/>
    </style:style>
    <style:style style:name="P65" style:family="paragraph" style:parent-style-name="Text_20_body" style:list-style-name="L16">
      <style:paragraph-properties fo:line-height="150%"/>
    </style:style>
    <style:style style:name="P66" style:family="paragraph" style:parent-style-name="Text_20_body" style:list-style-name="L17">
      <style:paragraph-properties fo:line-height="150%"/>
    </style:style>
    <style:style style:name="P67" style:family="paragraph" style:parent-style-name="Text_20_body" style:list-style-name="L18">
      <style:paragraph-properties fo:line-height="150%"/>
    </style:style>
    <style:style style:name="P68" style:family="paragraph" style:parent-style-name="Text_20_body" style:list-style-name="L2">
      <style:paragraph-properties fo:line-height="150%"/>
      <style:text-properties style:font-name="Liberation Serif"/>
    </style:style>
    <style:style style:name="P69" style:family="paragraph" style:parent-style-name="Text_20_body" style:list-style-name="L3">
      <style:paragraph-properties fo:line-height="150%"/>
      <style:text-properties style:font-name="Liberation Serif"/>
    </style:style>
    <style:style style:name="P70" style:family="paragraph" style:parent-style-name="Text_20_body" style:list-style-name="L6">
      <style:paragraph-properties fo:margin-left="0cm" fo:margin-right="0cm" fo:line-height="150%" fo:text-indent="0cm" style:auto-text-indent="false"/>
      <style:text-properties style:font-name="Liberation Serif"/>
    </style:style>
    <style:style style:name="P71" style:family="paragraph" style:parent-style-name="Text_20_body" style:list-style-name="L7">
      <style:paragraph-properties fo:margin-left="0cm" fo:margin-right="0cm" fo:line-height="150%" fo:text-indent="0cm" style:auto-text-indent="false"/>
      <style:text-properties style:font-name="Liberation Serif"/>
    </style:style>
    <style:style style:name="P72" style:family="paragraph" style:parent-style-name="Text_20_body" style:list-style-name="L18">
      <style:paragraph-properties fo:line-height="150%"/>
      <style:text-properties style:font-name="Liberation Serif"/>
    </style:style>
    <style:style style:name="P73" style:family="paragraph" style:parent-style-name="Text_20_body" style:list-style-name="L6">
      <style:paragraph-properties fo:line-height="150%"/>
      <style:text-properties style:font-name="Liberation Serif" fo:font-weight="bold"/>
    </style:style>
    <style:style style:name="P74" style:family="paragraph" style:parent-style-name="Text_20_body" style:list-style-name="L7">
      <style:paragraph-properties fo:line-height="150%"/>
      <style:text-properties style:font-name="Liberation Serif" fo:font-weight="bold"/>
    </style:style>
    <style:style style:name="P75" style:family="paragraph" style:parent-style-name="Text_20_body" style:list-style-name="L10">
      <style:paragraph-properties fo:line-height="150%"/>
      <style:text-properties style:font-name="Liberation Serif" fo:font-size="12pt" style:font-size-asian="12pt" style:font-size-complex="12pt"/>
    </style:style>
    <style:style style:name="P76" style:family="paragraph" style:parent-style-name="Text_20_body" style:list-style-name="L10">
      <style:paragraph-properties fo:line-height="150%"/>
      <style:text-properties style:font-name="Liberation Serif" fo:font-size="12pt" officeooo:paragraph-rsid="00473045" style:font-size-asian="12pt" style:font-size-complex="12pt"/>
    </style:style>
    <style:style style:name="P77" style:family="paragraph" style:parent-style-name="Text_20_body" style:list-style-name="L11">
      <style:paragraph-properties fo:line-height="150%"/>
      <style:text-properties style:font-name="Liberation Serif" fo:font-size="12pt" style:font-size-asian="12pt" style:font-size-complex="12pt"/>
    </style:style>
    <style:style style:name="P78" style:family="paragraph" style:parent-style-name="Text_20_body" style:list-style-name="L12">
      <style:paragraph-properties fo:line-height="150%"/>
      <style:text-properties style:font-name="Liberation Serif" fo:font-size="12pt" style:font-size-asian="12pt" style:font-size-complex="12pt"/>
    </style:style>
    <style:style style:name="P79" style:family="paragraph" style:parent-style-name="Text_20_body" style:list-style-name="L13">
      <style:paragraph-properties fo:line-height="150%"/>
      <style:text-properties style:font-name="Liberation Serif" fo:font-size="12pt" style:font-size-asian="12pt" style:font-size-complex="12pt"/>
    </style:style>
    <style:style style:name="P80" style:family="paragraph" style:parent-style-name="Text_20_body" style:list-style-name="L10">
      <style:paragraph-properties fo:line-height="150%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officeooo:rsid="00136a4b"/>
    </style:style>
    <style:style style:name="T3" style:family="text">
      <style:text-properties fo:font-weight="bold" officeooo:rsid="00161e8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8773d9" style:font-weight-asian="bold" style:font-weight-complex="bold"/>
    </style:style>
    <style:style style:name="T6" style:family="text">
      <style:text-properties officeooo:rsid="0011014f"/>
    </style:style>
    <style:style style:name="T7" style:family="text">
      <style:text-properties officeooo:rsid="001163b8"/>
    </style:style>
    <style:style style:name="T8" style:family="text">
      <style:text-properties officeooo:rsid="00136a4b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weight="bold"/>
    </style:style>
    <style:style style:name="T11" style:family="text">
      <style:text-properties style:font-name="Liberation Serif" fo:font-weight="bold" officeooo:rsid="0037db32"/>
    </style:style>
    <style:style style:name="T12" style:family="text">
      <style:text-properties style:font-name="Liberation Serif" fo:font-weight="bold" officeooo:rsid="003936dc"/>
    </style:style>
    <style:style style:name="T13" style:family="text">
      <style:text-properties style:font-name="Liberation Serif" fo:font-weight="bold" officeooo:rsid="003e1d53"/>
    </style:style>
    <style:style style:name="T14" style:family="text">
      <style:text-properties style:font-name="Liberation Serif" fo:font-weight="bold" officeooo:rsid="003e9d2c"/>
    </style:style>
    <style:style style:name="T15" style:family="text">
      <style:text-properties style:font-name="Liberation Serif" fo:font-style="italic"/>
    </style:style>
    <style:style style:name="T16" style:family="text">
      <style:text-properties style:font-name="Liberation Serif" fo:font-size="12pt" fo:font-weight="bold" style:font-size-asian="12pt" style:font-size-complex="12pt"/>
    </style:style>
    <style:style style:name="T17" style:family="text">
      <style:text-properties style:font-name="Liberation Serif" fo:font-size="12pt" style:font-size-asian="12pt" style:font-size-complex="12pt"/>
    </style:style>
    <style:style style:name="T18" style:family="text">
      <style:text-properties style:font-name="Liberation Serif" fo:font-size="12pt" officeooo:rsid="004eec24" style:font-size-asian="12pt" style:font-size-complex="12pt"/>
    </style:style>
    <style:style style:name="T19" style:family="text">
      <style:text-properties style:font-name="Liberation Serif" fo:font-size="12pt" officeooo:rsid="005ff851" style:font-size-asian="12pt" style:font-size-complex="12pt"/>
    </style:style>
    <style:style style:name="T20" style:family="text">
      <style:text-properties style:font-name="Liberation Serif" fo:font-size="12pt" officeooo:rsid="006082e8" style:font-size-asian="12pt" style:font-size-complex="12pt"/>
    </style:style>
    <style:style style:name="T21" style:family="text">
      <style:text-properties style:font-name="Liberation Serif" fo:font-size="12pt" officeooo:rsid="00616a16" style:font-size-asian="12pt" style:font-size-complex="12pt"/>
    </style:style>
    <style:style style:name="T22" style:family="text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T23" style:family="text">
      <style:text-properties style:font-name="Liberation Serif" officeooo:rsid="003fe740"/>
    </style:style>
    <style:style style:name="T24" style:family="text">
      <style:text-properties style:font-name="Liberation Serif" fo:font-style="normal" style:text-underline-style="solid" style:text-underline-width="auto" style:text-underline-color="font-color" style:font-style-asian="normal" style:font-style-complex="normal"/>
    </style:style>
    <style:style style:name="T25" style:family="text">
      <style:text-properties style:font-name="Liberation Serif" officeooo:rsid="0046293c"/>
    </style:style>
    <style:style style:name="T26" style:family="text">
      <style:text-properties style:font-name="Liberation Serif" officeooo:rsid="00472f22"/>
    </style:style>
    <style:style style:name="T27" style:family="text">
      <style:text-properties style:font-name="Liberation Serif" style:text-underline-style="solid" style:text-underline-width="auto" style:text-underline-color="font-color"/>
    </style:style>
    <style:style style:name="T28" style:family="text">
      <style:text-properties style:font-name="Liberation Serif" officeooo:rsid="001c4105"/>
    </style:style>
    <style:style style:name="T29" style:family="text">
      <style:text-properties style:font-name="Liberation Serif" officeooo:rsid="001cdb52"/>
    </style:style>
    <style:style style:name="T30" style:family="text">
      <style:text-properties style:font-name="Liberation Serif" officeooo:rsid="00237c03"/>
    </style:style>
    <style:style style:name="T31" style:family="text">
      <style:text-properties officeooo:rsid="00161e87"/>
    </style:style>
    <style:style style:name="T32" style:family="text">
      <style:text-properties officeooo:rsid="001f5543"/>
    </style:style>
    <style:style style:name="T33" style:family="text">
      <style:text-properties officeooo:rsid="00237c03"/>
    </style:style>
    <style:style style:name="T34" style:family="text">
      <style:text-properties officeooo:rsid="002fa3c3"/>
    </style:style>
    <style:style style:name="T35" style:family="text">
      <style:text-properties officeooo:rsid="003030c6"/>
    </style:style>
    <style:style style:name="T36" style:family="text">
      <style:text-properties officeooo:rsid="0034e11d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officeooo:rsid="00472f22"/>
    </style:style>
    <style:style style:name="T39" style:family="text">
      <style:text-properties officeooo:rsid="00473045"/>
    </style:style>
    <style:style style:name="T40" style:family="text">
      <style:text-properties fo:color="#080808" loext:opacity="100%" style:font-name="JetBrains Mono" fo:font-size="11.5pt" fo:font-style="normal" fo:font-weight="normal" style:font-size-asian="11.5pt" style:font-style-asian="normal" style:font-weight-asian="normal"/>
    </style:style>
    <style:style style:name="T41" style:family="text">
      <style:text-properties fo:color="#080808" loext:opacity="100%" style:font-name="Liberation Serif" fo:font-size="11.5pt" fo:font-style="normal" fo:font-weight="normal" style:font-size-asian="11.5pt" style:font-style-asian="normal" style:font-weight-asian="normal"/>
    </style:style>
    <style:style style:name="T42" style:family="text">
      <style:text-properties fo:color="#080808" loext:opacity="100%" style:font-name="Liberation Serif" fo:font-size="11.5pt" fo:font-style="normal" fo:font-weight="normal" style:font-size-asian="11.5pt" style:font-style-asian="normal" style:font-weight-asian="normal" style:font-size-complex="12pt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officeooo:rsid="008b4d59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RefHeading___Toc3543_2420637387"/>Szakdolgozat: Saját <text:span text:style-name="T44">p</text:span>rogramozási nyelv írása <text:bookmark-end text:name="__RefHeading___Toc3543_2420637387"/></text:p>
      <text:p text:style-name="P40"/>
      <text:p text:style-name="Standard"><text:bookmark-start text:name="__RefHeading___Toc3545_2420637387"/>Készítette: Fehér Vivien Fanni<text:bookmark-end text:name="__RefHeading___Toc3545_2420637387"/></text:p>
      <text:table-of-content text:style-name="Sect1" text:protected="true" text:name="Tartalomjegyzék2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rtalomjegyzék2_Head" text:protected="true">
            <text:p text:style-name="P27">Tartalomjegyzék</text:p>
          </text:index-title>
          <text:p text:style-name="P24"><text:a xlink:type="simple" xlink:href="#__RefHeading___Toc865_2130702120" text:style-name="Index_20_Link" text:visited-style-name="Index_20_Link">Szakdolgozat: Saját programozási nyelv írása<text:tab/>3</text:a></text:p>
          <text:p text:style-name="P25"><text:a xlink:type="simple" xlink:href="#__RefHeading___Toc867_2130702120" text:style-name="Index_20_Link" text:visited-style-name="Index_20_Link">1. Bevezetés és célkitűzés<text:tab/>3</text:a></text:p>
          <text:p text:style-name="P25"><text:a xlink:type="simple" xlink:href="#__RefHeading___Toc869_2130702120" text:style-name="Index_20_Link" text:visited-style-name="Index_20_Link">2. A Programozási nyelvek felépítése<text:tab/>3</text:a></text:p>
          <text:p text:style-name="P26"><text:a xlink:type="simple" xlink:href="#__RefHeading___Toc871_2130702120" text:style-name="Index_20_Link" text:visited-style-name="Index_20_Link">2.1. Lexikális Elemzés - Lexing:<text:tab/>3</text:a></text:p>
          <text:p text:style-name="P26"><text:a xlink:type="simple" xlink:href="#__RefHeading___Toc873_2130702120" text:style-name="Index_20_Link" text:visited-style-name="Index_20_Link">2.2. Szintaktikai Elemzés - Parsing:<text:tab/>4</text:a></text:p>
          <text:p text:style-name="P26"><text:a xlink:type="simple" xlink:href="#__RefHeading___Toc875_2130702120" text:style-name="Index_20_Link" text:visited-style-name="Index_20_Link">2.3. Kiértékelés - Evaluation:<text:tab/>4</text:a></text:p>
          <text:p text:style-name="P25"><text:a xlink:type="simple" xlink:href="#__RefHeading___Toc877_2130702120" text:style-name="Index_20_Link" text:visited-style-name="Index_20_Link">3. A "MiniNyelv" Tervezése és Funkciói<text:tab/>4</text:a></text:p>
          <text:p text:style-name="P26"><text:a xlink:type="simple" xlink:href="#__RefHeading___Toc879_2130702120" text:style-name="Index_20_Link" text:visited-style-name="Index_20_Link">3.1. Típusrendszer:<text:tab/>5</text:a></text:p>
          <text:p text:style-name="P26"><text:a xlink:type="simple" xlink:href="#__RefHeading___Toc881_2130702120" text:style-name="Index_20_Link" text:visited-style-name="Index_20_Link">3.2. Változók:<text:tab/>5</text:a></text:p>
          <text:p text:style-name="P26"><text:a xlink:type="simple" xlink:href="#__RefHeading___Toc883_2130702120" text:style-name="Index_20_Link" text:visited-style-name="Index_20_Link">3.3. Parancsok és Kifejezések:<text:tab/>5</text:a></text:p>
          <text:p text:style-name="P26"><text:a xlink:type="simple" xlink:href="#__RefHeading___Toc885_2130702120" text:style-name="Index_20_Link" text:visited-style-name="Index_20_Link">3.4. Vezérlési Szerkezetek (IF):<text:tab/>5</text:a></text:p>
          <text:p text:style-name="P26"><text:a xlink:type="simple" xlink:href="#__RefHeading___Toc887_2130702120" text:style-name="Index_20_Link" text:visited-style-name="Index_20_Link">3.5. Kommentek:<text:tab/>6</text:a></text:p>
          <text:p text:style-name="P25"><text:a xlink:type="simple" xlink:href="#__RefHeading___Toc889_2130702120" text:style-name="Index_20_Link" text:visited-style-name="Index_20_Link">4. Implementáció Java nyelven:<text:tab/>6</text:a></text:p>
          <text:p text:style-name="P26"><text:a xlink:type="simple" xlink:href="#__RefHeading___Toc891_2130702120" text:style-name="Index_20_Link" text:visited-style-name="Index_20_Link">4.1. Az Architektúra Fő Komponensei:<text:tab/>6</text:a></text:p>
          <text:p text:style-name="P26"><text:a xlink:type="simple" xlink:href="#__RefHeading___Toc893_2130702120" text:style-name="Index_20_Link" text:visited-style-name="Index_20_Link">4.2. Tervezési Döntések:<text:tab/>8</text:a></text:p>
          <text:p text:style-name="P25"><text:a xlink:type="simple" xlink:href="#__RefHeading___Toc916_2130702120" text:style-name="Index_20_Link" text:visited-style-name="Index_20_Link">4.3. A Projekt Osztályszerkezete és Fájljai:<text:tab/>9</text:a></text:p>
          <text:p text:style-name="P26"><text:a xlink:type="simple" xlink:href="#__RefHeading___Toc918_2130702120" text:style-name="Index_20_Link" text:visited-style-name="Index_20_Link">A. Rendszerkomponensek (Core System):<text:tab/>9</text:a></text:p>
          <text:p text:style-name="P26"><text:a xlink:type="simple" xlink:href="#__RefHeading___Toc920_2130702120" text:style-name="Index_20_Link" text:visited-style-name="Index_20_Link">B. Interfészek (Interfaces):<text:tab/>10</text:a></text:p>
          <text:p text:style-name="P26"><text:a xlink:type="simple" xlink:href="#__RefHeading___Toc922_2130702120" text:style-name="Index_20_Link" text:visited-style-name="Index_20_Link">C. Utasítás Implementációk (Statements):<text:tab/>10</text:a></text:p>
          <text:p text:style-name="P26"><text:a xlink:type="simple" xlink:href="#__RefHeading___Toc924_2130702120" text:style-name="Index_20_Link" text:visited-style-name="Index_20_Link">D. Kifejezés Implementációk (Expressions):<text:tab/>11</text:a></text:p>
          <text:p text:style-name="P25"><text:a xlink:type="simple" xlink:href="#__RefHeading___Toc3273_2420637387" text:style-name="Index_20_Link" text:visited-style-name="Index_20_Link">4.4. Memóriakezelés és Állapottér (Environment):<text:tab/>12</text:a></text:p>
          <text:p text:style-name="P26"><text:a xlink:type="simple" xlink:href="#__RefHeading___Toc3275_2420637387" text:style-name="Index_20_Link" text:visited-style-name="Index_20_Link">4.4.1. A Változók Tárolása<text:tab/>12</text:a></text:p>
          <text:p text:style-name="P26"><text:a xlink:type="simple" xlink:href="#__RefHeading___Toc3277_2420637387" text:style-name="Index_20_Link" text:visited-style-name="Index_20_Link">4.4.2. Élettartam (Scope):<text:tab/>14</text:a></text:p>
          <text:p text:style-name="P24"><text:a xlink:type="simple" xlink:href="#__RefHeading___Toc3395_2420637387" text:style-name="Index_20_Link" text:visited-style-name="Index_20_Link">5. A Rendszer Fordítása és Futtatása<text:tab/>14</text:a></text:p>
          <text:p text:style-name="P25"><text:a xlink:type="simple" xlink:href="#__RefHeading___Toc3397_2420637387" text:style-name="Index_20_Link" text:visited-style-name="Index_20_Link">5.1. Könyvtárszerkezet:<text:tab/>14</text:a></text:p>
          <text:p text:style-name="P25"><text:a xlink:type="simple" xlink:href="#__RefHeading___Toc3399_2420637387" text:style-name="Index_20_Link" text:visited-style-name="Index_20_Link">5.2. Az Interpreter Fordítása (Compilation):<text:tab/>15</text:a></text:p>
          <text:p text:style-name="P25"><text:a xlink:type="simple" xlink:href="#__RefHeading___Toc3401_2420637387" text:style-name="Index_20_Link" text:visited-style-name="Index_20_Link">5.3. A Mini Program Futtatása (Execution):<text:tab/>15</text:a></text:p>
          <text:p text:style-name="P25"><text:a xlink:type="simple" xlink:href="#__RefHeading___Toc3403_2420637387" text:style-name="Index_20_Link" text:visited-style-name="Index_20_Link">5.4. Várt Kimenet<text:tab/>16</text:a></text:p>
          <text:p text:style-name="P24"><text:a xlink:type="simple" xlink:href="#__RefHeading___Toc895_2130702120" text:style-name="Index_20_Link" text:visited-style-name="Index_20_Link">6. Összegzés és további fejlesztési lehetőségek<text:tab/>16</text:a></text:p>
        </text:index-body>
      </text:table-of-content>
      <text:p text:style-name="Text_20_body"/>
      <text:h text:style-name="P3" text:outline-level="2"><text:bookmark-start text:name="__RefHeading___Toc865_2130702120"/>Szakdolgozat: <text:span text:style-name="T6">Saját programozási nyelv írása</text:span><text:bookmark-end text:name="__RefHeading___Toc865_2130702120"/></text:h>
      <text:p text:style-name="P9"/>
      <text:h text:style-name="P4" text:outline-level="3"><text:bookmark-start text:name="__RefHeading___Toc867_2130702120"/>1. Bevezetés és <text:span text:style-name="T34">c</text:span>élkitűzés<text:bookmark-end text:name="__RefHeading___Toc867_2130702120"/></text:h>
      <text:p text:style-name="P9">A szoftverfejlesztés világában ritkán adódik lehetőség arra, hogy a legalapvetőbb építőkockákkal, magukkal a programozási nyelvekkel foglalkozzunk. <text:span text:style-name="T7">A szakdolgozatom </text:span>egy ilyen folyamatot mutat be, egy saját, minimalista programozási nyelv ("MiniNyelv") tervezését és megvalósítását.</text:p>
      <text:p text:style-name="P9"><text:span text:style-name="T1">A </text:span><text:span text:style-name="T3">szakdolgozatom</text:span><text:span text:style-name="T1"> elsődleges célja</text:span> nem egy ipari erősségű, általános célú programozási nyelv létrehozása volt, hanem<text:span text:style-name="T4"> a nyelvkészítés folyamatának és alapelveinek gyakorlati bemutatása. </text:span>A cél<text:span text:style-name="T31">om</text:span> <text:span text:style-name="T43">egy olyan </text:span><text:span text:style-name="T4">egyszerű, "script" jellegű nyelv</text:span><text:span text:style-name="T43"> megírása volt, </text:span><text:span text:style-name="T4">amely képes alapvető matematikai és logikai műveletek elvégzésére, változók kezelésére és vezérlési szerkezetek használatára.</text:span><text:span text:style-name="T5">******</text:span></text:p>
      <text:p text:style-name="P9"><text:span text:style-name="T4">A projekt során megvalósított interpreter Java nyelven íródott</text:span>, kihasználva a Java objektumorientált képességeit, különösen az <text:span text:style-name="T1">Interpreter Tervezési Mint</text:span><text:span text:style-name="T2">át</text:span> (Interpreter Design Pattern).</text:p>
      <text:p text:style-name="P9"/>
      <text:h text:style-name="P4" text:outline-level="3"><text:bookmark-start text:name="__RefHeading___Toc869_2130702120"/>2. A Programozási <text:span text:style-name="T34">n</text:span>yelvek <text:span text:style-name="T34">f</text:span>elépítése<text:bookmark-end text:name="__RefHeading___Toc869_2130702120"/></text:h>
      <text:p text:style-name="P9">Mielőtt rátérnénk a saját nyelv<text:span text:style-name="T8">em </text:span>implementációjára, fontos megérteni, hogyan kel életre egy programozási nyelv a beírt szöveges kódból. Ez a folyamat szinte mindig három fő lépésből áll:</text:p>
      <text:p text:style-name="P9"/>
      <text:h text:style-name="P7" text:outline-level="4"><text:bookmark-start text:name="__RefHeading___Toc871_2130702120"/>2.1. Lexikális Elemzés - Lexing:<text:bookmark-end text:name="__RefHeading___Toc871_2130702120"/></text:h>
      <text:p text:style-name="P9">A "lexer" (vagy "tokenizáló") feladata, hogy a nyers forráskódot (egy hosszú karakterfolyamot) apró, jelentéssel bíró egységekre, úgynevezett <text:span text:style-name="T1">tokenekre</text:span> bontsa.</text:p>
      <text:list text:style-name="L1">
        <text:list-item>
          <text:p text:style-name="P51"><text:span text:style-name="T10">Példa:</text:span><text:span text:style-name="T9"> A </text:span><text:span text:style-name="Source_20_Text"><text:span text:style-name="T9">var x = 10;</text:span></text:span><text:span text:style-name="T9"> kódsor a lexer számára nem csak egy szöveg.</text:span></text:p>
        </text:list-item>
        <text:list-item>
          <text:p text:style-name="P51"><text:span text:style-name="T10">Eredmény (Tokenek):</text:span><text:span text:style-name="T9"> </text:span><text:span text:style-name="Source_20_Text"><text:span text:style-name="T9">VAR</text:span></text:span><text:span text:style-name="T9"> (kulcsszó), </text:span><text:span text:style-name="Source_20_Text"><text:span text:style-name="T9">IDENTIFIER("x")</text:span></text:span><text:span text:style-name="T9"> (azonosító), </text:span><text:span text:style-name="Source_20_Text"><text:span text:style-name="T9">EQUALS</text:span></text:span><text:span text:style-name="T9"> (operátor), </text:span><text:span text:style-name="Source_20_Text"><text:span text:style-name="T9">NUMBER(10)</text:span></text:span><text:span text:style-name="T9"> (literál), </text:span><text:span text:style-name="Source_20_Text"><text:span text:style-name="T9">SEMICOLON</text:span></text:span><text:span text:style-name="T9"> (elválasztó).</text:span></text:p>
          <text:p text:style-name="P51"><text:span text:style-name="T9"/></text:p>
        </text:list-item>
      </text:list>
      <text:h text:style-name="P7" text:outline-level="4"><text:bookmark-start text:name="__RefHeading___Toc873_2130702120"/><text:soft-page-break/>2.2. Szintaktikai Elemzés - Parsing:<text:bookmark-end text:name="__RefHeading___Toc873_2130702120"/></text:h>
      <text:p text:style-name="P9">A "parser" ("elemző") feladata, hogy a lexer által generált tokenek sorozatát fogadja, és ellenőrizze, hogy azok a nyelv nyelvtani szabályainak (a szintaxisnak) megfelelnek-e. Ha igen, a tokenekből egy fa-struktúrát épít fel, amelyet <text:span text:style-name="T1">Absztrakt Szintaxis Fának (AST - Abstract Syntax Tree)</text:span> nevezünk.</text:p>
      <text:list text:style-name="L2">
        <text:list-item>
          <text:p text:style-name="P52"><text:span text:style-name="T10">Példa:</text:span><text:span text:style-name="T9"> A </text:span><text:span text:style-name="Source_20_Text"><text:span text:style-name="T9">5 + (2 * 3)</text:span></text:span><text:span text:style-name="T9"> kifejezés AST-je:</text:span></text:p>
          <text:p text:style-name="P42"><text:span text:style-name="Source_20_Text"><text:span text:style-name="T9"><text:s text:c="6"/>+</text:span></text:span></text:p>
          <text:p text:style-name="P43"><text:span text:style-name="Source_20_Text"><text:span text:style-name="T9"><text:s text:c="5"/>/ \</text:span></text:span></text:p>
          <text:p text:style-name="P43"><text:span text:style-name="Source_20_Text"><text:span text:style-name="T9"><text:s text:c="4"/>5 <text:s text:c="2"/>*</text:span></text:span></text:p>
          <text:p text:style-name="P43"><text:span text:style-name="Source_20_Text"><text:span text:style-name="T9"><text:s text:c="7"/>/ \</text:span></text:span></text:p>
          <text:p text:style-name="P44"><text:span text:style-name="Source_20_Text"><text:span text:style-name="T9"><text:s text:c="6"/>2 <text:s text:c="2"/>3</text:span></text:span></text:p>
        </text:list-item>
        <text:list-item>
          <text:p text:style-name="P68"><text:span text:style-name="T1">Miért fontos?</text:span> Az AST a program logikai struktúráját képviseli, tiszteletben tartva a műveleti sorrendet és a zárójelezést. A program futtatása már ezen a fán fog végigmenni.</text:p>
          <text:p text:style-name="P68"/>
        </text:list-item>
      </text:list>
      <text:h text:style-name="P7" text:outline-level="4"><text:bookmark-start text:name="__RefHeading___Toc875_2130702120"/>2.3. Kiértékelés - Evaluation:<text:bookmark-end text:name="__RefHeading___Toc875_2130702120"/></text:h>
      <text:p text:style-name="P9">Az AST felépítése után két fő út áll:</text:p>
      <text:list text:style-name="L3">
        <text:list-item>
          <text:p text:style-name="P69"><text:span text:style-name="T1">Fordítás (Compilation):</text:span> Egy <text:span text:style-name="T1">fordítóprogram (compiler)</text:span> az AST-t egy másik nyelvre (jellemzően gépi kódra vagy egy alacsonyabb szintű nyelvre, mint a Java bytecode) fordítja le. A futtatás később történik, ezen az új, lefordított fájlon.</text:p>
        </text:list-item>
        <text:list-item>
          <text:p text:style-name="P69"><text:span text:style-name="T1">Értelmezés (Interpretation):</text:span> Egy <text:span text:style-name="T1">értelmező (interpreter)</text:span> fogja az AST-t, és azonnal, "lépésről-lépésre" végrehajtja azt. Nem hoz létre új fájlt, hanem futásidőben értelmezi a fát.</text:p>
          <text:p text:style-name="P69"/>
        </text:list-item>
      </text:list>
      <text:p text:style-name="P9"><text:span text:style-name="T1">A </text:span><text:span text:style-name="T3">szakdolgozatom</text:span><text:span text:style-name="T1"> egy Interpretert valósít meg</text:span>, mivel ez a megközelítés egyszerűbb, gyorsabb fejlesztést tesz lehetővé, és tökéletes egy dinamikus scriptnyelvhez.</text:p>
      <text:p text:style-name="P9"/>
      <text:p text:style-name="P2"/>
      <text:h text:style-name="P4" text:outline-level="3"><text:bookmark-start text:name="__RefHeading___Toc877_2130702120"/>3. A "MiniNyelv" Tervezése és Funkciói<text:bookmark-end text:name="__RefHeading___Toc877_2130702120"/></text:h>
      <text:p text:style-name="P9">A "MiniNyelv" egy egyszerű, dinamikusan típusos, sor-alapú scriptnyelv. Az alábbiakban a főbb funkcióit részletezzük.</text:p>
      <text:p text:style-name="P9"><text:soft-page-break/></text:p>
      <text:h text:style-name="P7" text:outline-level="4"><text:bookmark-start text:name="__RefHeading___Toc879_2130702120"/>3.1. Típusrendszer:<text:bookmark-end text:name="__RefHeading___Toc879_2130702120"/></text:h>
      <text:p text:style-name="P23">A nyelv két beépített típust kezel:</text:p>
      <text:list text:style-name="L4">
        <text:list-item>
          <text:p text:style-name="P53"><text:span text:style-name="T10">Szám (Number):</text:span><text:span text:style-name="T9"> A nyelv minden számot </text:span><text:span text:style-name="Source_20_Text"><text:span text:style-name="T9">double</text:span></text:span><text:span text:style-name="T9"> (lebegőpontos) típusként kezel.</text:span></text:p>
        </text:list-item>
        <text:list-item>
          <text:p text:style-name="P53"><text:span text:style-name="T10">Szöveg (String):</text:span><text:span text:style-name="T9"> Idézőjelek (</text:span><text:span text:style-name="Source_20_Text"><text:span text:style-name="T9">"</text:span></text:span><text:span text:style-name="T9">) között megadott karaktersorozatok.</text:span></text:p>
        </text:list-item>
      </text:list>
      <text:p text:style-name="P37"><text:span text:style-name="T9"/></text:p>
      <text:h text:style-name="P7" text:outline-level="4"><text:bookmark-start text:name="__RefHeading___Toc881_2130702120"/>3.2. Változók:<text:bookmark-end text:name="__RefHeading___Toc881_2130702120"/></text:h>
      <text:p text:style-name="P37"><text:span text:style-name="T9">A változókat a </text:span><text:span text:style-name="Source_20_Text"><text:span text:style-name="T9">var</text:span></text:span><text:span text:style-name="T9"> kulcsszóval lehet deklarálni és inicializálni. A már meglévő változók a </text:span><text:span text:style-name="Source_20_Text"><text:span text:style-name="T9">var</text:span></text:span><text:span text:style-name="T9"> kulcsszó nélkül is kaphatnak új értéket.</text:span></text:p>
      <text:p text:style-name="P28"><text:span text:style-name="Source_20_Text"><text:span text:style-name="T9"># Változó deklaráció</text:span></text:span></text:p>
      <text:p text:style-name="P33"><text:span text:style-name="Source_20_Text"><text:span text:style-name="T9">var x = 10</text:span></text:span></text:p>
      <text:p text:style-name="P33"><text:span text:style-name="Source_20_Text"><text:span text:style-name="T9">var nev = "Teszt Elek"</text:span></text:span></text:p>
      <text:p text:style-name="P8"/>
      <text:p text:style-name="P33"><text:span text:style-name="Source_20_Text"><text:span text:style-name="T9"># Értékadás (felülírás)</text:span></text:span></text:p>
      <text:p text:style-name="P34"><text:span text:style-name="Source_20_Text"><text:span text:style-name="T9">x = (x + 5) * 2</text:span></text:span></text:p>
      <text:h text:style-name="P7" text:outline-level="4"/>
      <text:h text:style-name="P7" text:outline-level="4"><text:bookmark-start text:name="__RefHeading___Toc883_2130702120"/>3.3. Parancsok és Kifejezések:<text:bookmark-end text:name="__RefHeading___Toc883_2130702120"/></text:h>
      <text:list text:style-name="L5">
        <text:list-item>
          <text:p text:style-name="P54"><text:span text:style-name="Source_20_Text"><text:span text:style-name="T9">print [kifejezés]</text:span></text:span><text:span text:style-name="T9">: Kiírja a konzolra a megadott kifejezés értékét.</text:span></text:p>
          <text:p text:style-name="P45"><text:span text:style-name="Source_20_Text"><text:span text:style-name="T9">print "Helló " + nev <text:s/># Kiírja: Helló Teszt Elek</text:span></text:span></text:p>
          <text:p text:style-name="P46"><text:span text:style-name="Source_20_Text"><text:span text:style-name="T9">print x / 2 <text:s text:c="10"/># Kiírja: 15.0</text:span></text:span></text:p>
        </text:list-item>
        <text:list-item>
          <text:p text:style-name="P54"><text:span text:style-name="T10">Matematikai kifejezések:</text:span><text:span text:style-name="T9"> Támogatja az alapvető </text:span><text:span text:style-name="Source_20_Text"><text:span text:style-name="T9">+</text:span></text:span><text:span text:style-name="T9">, </text:span><text:span text:style-name="Source_20_Text"><text:span text:style-name="T9">-</text:span></text:span><text:span text:style-name="T9">, </text:span><text:span text:style-name="Source_20_Text"><text:span text:style-name="T9">*</text:span></text:span><text:span text:style-name="T9">, </text:span><text:span text:style-name="Source_20_Text"><text:span text:style-name="T9">/</text:span></text:span><text:span text:style-name="T9"> műveleteket, tiszteletben tartva a műveleti sorrendet és a zárójelezést. A </text:span><text:span text:style-name="Source_20_Text"><text:span text:style-name="T9">+</text:span></text:span><text:span text:style-name="T9"> operátor stringek összefűzésére is képes.</text:span></text:p>
        </text:list-item>
        <text:list-item>
          <text:p text:style-name="P54"><text:span text:style-name="T10">Logikai kifejezések:</text:span><text:span text:style-name="T9"> Támogatja az összehasonlító operátorokat: </text:span><text:span text:style-name="Source_20_Text"><text:span text:style-name="T9">==</text:span></text:span><text:span text:style-name="T9">, </text:span><text:span text:style-name="Source_20_Text"><text:span text:style-name="T9">!=</text:span></text:span><text:span text:style-name="T9">, </text:span><text:span text:style-name="Source_20_Text"><text:span text:style-name="T9">&gt;</text:span></text:span><text:span text:style-name="T9">, </text:span><text:span text:style-name="Source_20_Text"><text:span text:style-name="T9">&lt;</text:span></text:span><text:span text:style-name="T9">, </text:span><text:span text:style-name="Source_20_Text"><text:span text:style-name="T9">&gt;=</text:span></text:span><text:span text:style-name="T9">, </text:span><text:span text:style-name="Source_20_Text"><text:span text:style-name="T9">&lt;=</text:span></text:span><text:span text:style-name="T9">.</text:span></text:p>
          <text:p text:style-name="P54"><text:span text:style-name="T9"/></text:p>
        </text:list-item>
      </text:list>
      <text:h text:style-name="P7" text:outline-level="4"><text:bookmark-start text:name="__RefHeading___Toc885_2130702120"/>3.4. Vezérlési Szerkezetek (IF):<text:bookmark-end text:name="__RefHeading___Toc885_2130702120"/></text:h>
      <text:p text:style-name="P37"><text:span text:style-name="T9">A nyelv támogatja az </text:span><text:span text:style-name="Source_20_Text"><text:span text:style-name="T9">if-then-else-endif</text:span></text:span><text:span text:style-name="T9"> szerkezeteket. A feltételnek egy logikai kifejezésnek kell lennie (amely </text:span><text:span text:style-name="Source_20_Text"><text:span text:style-name="T9">1.0</text:span></text:span><text:span text:style-name="T9">-ra (igaz) vagy </text:span><text:span text:style-name="Source_20_Text"><text:span text:style-name="T9">0.0</text:span></text:span><text:span text:style-name="T9">-ra (hamis) értékelődik ki).</text:span></text:p>
      <text:p text:style-name="P28"><text:soft-page-break/><text:span text:style-name="Source_20_Text"><text:span text:style-name="T9">var kor = 25</text:span></text:span></text:p>
      <text:p text:style-name="P8"/>
      <text:p text:style-name="P33"><text:span text:style-name="Source_20_Text"><text:span text:style-name="T9">if (kor &gt;= 18) then</text:span></text:span></text:p>
      <text:p text:style-name="P33"><text:span text:style-name="Source_20_Text"><text:span text:style-name="T9"><text:s text:c="2"/>print "Felnőtt"</text:span></text:span></text:p>
      <text:p text:style-name="P33"><text:span text:style-name="Source_20_Text"><text:span text:style-name="T9">else</text:span></text:span></text:p>
      <text:p text:style-name="P33"><text:span text:style-name="Source_20_Text"><text:span text:style-name="T9"><text:s text:c="2"/>print "Kiskorú"</text:span></text:span></text:p>
      <text:p text:style-name="P34"><text:span text:style-name="Source_20_Text"><text:span text:style-name="T9">endif</text:span></text:span></text:p>
      <text:p text:style-name="P34"><text:span text:style-name="Source_20_Text"><text:span text:style-name="T9"/></text:span></text:p>
      <text:h text:style-name="P7" text:outline-level="4"><text:bookmark-start text:name="__RefHeading___Toc887_2130702120"/>3.5. Kommentek:<text:bookmark-end text:name="__RefHeading___Toc887_2130702120"/></text:h>
      <text:p text:style-name="P37"><text:span text:style-name="T9">A </text:span><text:span text:style-name="Source_20_Text"><text:span text:style-name="T9">#</text:span></text:span><text:span text:style-name="T9"> jellel kezdődő sorok vagy sorrészek kommentnek minősülnek, az interpreter figyelmen kívül hagyja őket.</text:span></text:p>
      <text:p text:style-name="P37"><text:span text:style-name="T9"/></text:p>
      <text:p text:style-name="P2"/>
      <text:h text:style-name="P5" text:outline-level="3"><text:bookmark-start text:name="__RefHeading___Toc889_2130702120"/>4. Implementáció <text:span text:style-name="T35">J</text:span>ava <text:span text:style-name="T35">n</text:span>yelven:<text:bookmark-end text:name="__RefHeading___Toc889_2130702120"/></text:h>
      <text:p text:style-name="P6">A "MiniNyelv" interpreterének magja az <text:span text:style-name="T1">Interpreter Tervezési Minta</text:span> (Interpreter Design Pattern). Ennek lényege, hogy a nyelv nyelvtanának minden elemét (pl. "szám", "bináris művelet", "print parancs") egy külön Java osztály képviseli, amelyek mind egy közös interfészt valósítanak meg.</text:p>
      <text:p text:style-name="P9">Az AST, amiről korábban <text:span text:style-name="T36">írtam</text:span>, valójában ezen Java objektumok összességéből épül fel.</text:p>
      <text:p text:style-name="P9"/>
      <text:h text:style-name="P7" text:outline-level="4"><text:bookmark-start text:name="__RefHeading___Toc891_2130702120"/>4.1. Az Architektúra Fő Komponensei:<text:bookmark-end text:name="__RefHeading___Toc891_2130702120"/></text:h>
      <text:p text:style-name="P9">A projekt több, logikailag elkülönített komponensre lett bontva.</text:p>
      <text:p text:style-name="P9"/>
      <text:p text:style-name="P38"><text:span text:style-name="T10">1. A Kifejezés Interfész – Expression </text:span><text:span text:style-name="T13">osztályok</text:span><text:span text:style-name="T10">:</text:span><text:span text:style-name="T9"> Ez a legfontosabb absztrakció. Minden, ami </text:span><text:span text:style-name="T15">visszaad egy értéket</text:span><text:span text:style-name="T9"> (egy szám, egy string, egy változó értéke, egy matematikai művelet eredménye), az </text:span><text:span text:style-name="Source_20_Text"><text:span text:style-name="T9">Expression</text:span></text:span><text:span text:style-name="T9">.</text:span></text:p>
      <text:p text:style-name="P37"><text:span text:style-name="T9"/></text:p>
      <text:list text:style-name="L6">
        <text:list-item>
          <text:p text:style-name="P55"><text:span text:style-name="Source_20_Text"><text:span text:style-name="T9">Expression.java</text:span></text:span></text:p>
          <text:p text:style-name="P70">Java</text:p>
          <text:p text:style-name="P47"><text:soft-page-break/><text:span text:style-name="Source_20_Text"><text:span text:style-name="T9">public interface Expression {</text:span></text:span></text:p>
          <text:p text:style-name="P47"><text:span text:style-name="Source_20_Text"><text:span text:style-name="T9"><text:s text:c="4"/>// Mivel van szám és string is, Object-et adunk vissza</text:span></text:span></text:p>
          <text:p text:style-name="P47"><text:span text:style-name="Source_20_Text"><text:span text:style-name="T9"><text:s text:c="4"/>Object evaluate(Environment env); </text:span></text:span></text:p>
          <text:p text:style-name="P48"><text:span text:style-name="Source_20_Text"><text:span text:style-name="T9">}</text:span></text:span></text:p>
        </text:list-item>
        <text:list-item>
          <text:p text:style-name="P73">Implementációk:</text:p>
          <text:list>
            <text:list-item>
              <text:p text:style-name="P55"><text:span text:style-name="Source_20_Text"><text:span text:style-name="T9">NumberExpression</text:span></text:span><text:span text:style-name="T9">: Egy sima számot tárol (pl. </text:span><text:span text:style-name="Source_20_Text"><text:span text:style-name="T9">5</text:span></text:span><text:span text:style-name="T9">). </text:span><text:span text:style-name="Source_20_Text"><text:span text:style-name="T9">evaluate()</text:span></text:span><text:span text:style-name="T9"> önmagát adja vissza.</text:span></text:p>
            </text:list-item>
            <text:list-item>
              <text:p text:style-name="P55"><text:span text:style-name="Source_20_Text"><text:span text:style-name="T9">StringExpression</text:span></text:span><text:span text:style-name="T9">: Egy stringet tárol (pl. </text:span><text:span text:style-name="Source_20_Text"><text:span text:style-name="T9">"hello"</text:span></text:span><text:span text:style-name="T9">).</text:span></text:p>
            </text:list-item>
            <text:list-item>
              <text:p text:style-name="P55"><text:span text:style-name="Source_20_Text"><text:span text:style-name="T9">VariableExpression</text:span></text:span><text:span text:style-name="T9">: Egy változó nevét tárolja (pl. </text:span><text:span text:style-name="Source_20_Text"><text:span text:style-name="T9">x</text:span></text:span><text:span text:style-name="T9">). </text:span><text:span text:style-name="Source_20_Text"><text:span text:style-name="T9">evaluate()</text:span></text:span><text:span text:style-name="T9"> kikeresi a változó értékét a </text:span><text:span text:style-name="Source_20_Text"><text:span text:style-name="T9">Environment</text:span></text:span><text:span text:style-name="T9">-ből.</text:span></text:p>
            </text:list-item>
            <text:list-item>
              <text:p text:style-name="P55"><text:span text:style-name="Source_20_Text"><text:span text:style-name="T9">BinaryExpression</text:span></text:span><text:span text:style-name="T9">: Egy bal és egy jobb oldali </text:span><text:span text:style-name="Source_20_Text"><text:span text:style-name="T9">Expression</text:span></text:span><text:span text:style-name="T9">-t, valamint egy operátort tárol (pl. </text:span><text:span text:style-name="Source_20_Text"><text:span text:style-name="T9">5 + x</text:span></text:span><text:span text:style-name="T9">).</text:span></text:p>
            </text:list-item>
            <text:list-item>
              <text:p text:style-name="P55"><text:span text:style-name="Source_20_Text"><text:span text:style-name="T9">ComparisonExpression</text:span></text:span><text:span text:style-name="T9">: Hasonló a binárishoz, de összehasonlításokat végez.</text:span></text:p>
              <text:p text:style-name="P55"><text:span text:style-name="T9"/></text:p>
            </text:list-item>
          </text:list>
        </text:list-item>
      </text:list>
      <text:p text:style-name="P38"><text:span text:style-name="T10">2. A Parancs Interfész – Statement </text:span><text:span text:style-name="T14">osztály</text:span><text:span text:style-name="T10">:</text:span><text:span text:style-name="T9"> Minden, ami </text:span><text:span text:style-name="T15">végrehajt egy műveletet</text:span><text:span text:style-name="T9">, de nem ad vissza értéket (mint a </text:span><text:span text:style-name="Source_20_Text"><text:span text:style-name="T9">print</text:span></text:span><text:span text:style-name="T9"> vagy az értékadás), az </text:span><text:span text:style-name="Source_20_Text"><text:span text:style-name="T9">Statement</text:span></text:span><text:span text:style-name="T9">.</text:span></text:p>
      <text:list text:style-name="L7">
        <text:list-item>
          <text:p text:style-name="P56"><text:span text:style-name="Source_20_Text"><text:span text:style-name="T9">Statement.java</text:span></text:span></text:p>
          <text:p text:style-name="P71">Java</text:p>
          <text:p text:style-name="P49"><text:span text:style-name="Source_20_Text"><text:span text:style-name="T9">public interface Statement {</text:span></text:span></text:p>
          <text:p text:style-name="P49"><text:span text:style-name="Source_20_Text"><text:span text:style-name="T9"><text:s text:c="4"/>void execute(Environment env);</text:span></text:span></text:p>
          <text:p text:style-name="P50"><text:span text:style-name="Source_20_Text"><text:span text:style-name="T9">}</text:span></text:span></text:p>
        </text:list-item>
        <text:list-item>
          <text:p text:style-name="P74">Implementációk:</text:p>
          <text:list>
            <text:list-item>
              <text:p text:style-name="P56"><text:span text:style-name="Source_20_Text"><text:span text:style-name="T9">PrintStatement</text:span></text:span><text:span text:style-name="T9">: Tárol egy </text:span><text:span text:style-name="Source_20_Text"><text:span text:style-name="T9">Expression</text:span></text:span><text:span text:style-name="T9">-t. </text:span><text:span text:style-name="Source_20_Text"><text:span text:style-name="T9">execute()</text:span></text:span><text:span text:style-name="T9"> kiértékeli és kiírja az eredményt.</text:span></text:p>
            </text:list-item>
            <text:list-item>
              <text:p text:style-name="P56"><text:span text:style-name="Source_20_Text"><text:span text:style-name="T9">VarAssignStatement</text:span></text:span><text:span text:style-name="T9">: Tárol egy változónevet és egy </text:span><text:span text:style-name="Source_20_Text"><text:span text:style-name="T9">Expression</text:span></text:span><text:span text:style-name="T9">-t. </text:span><text:span text:style-name="Source_20_Text"><text:span text:style-name="T9">execute()</text:span></text:span><text:span text:style-name="T9"> kiértékeli a kifejezést és elmenti az eredményt a </text:span><text:span text:style-name="Source_20_Text"><text:span text:style-name="T9">Environment</text:span></text:span><text:span text:style-name="T9">-be.</text:span></text:p>
            </text:list-item>
            <text:list-item>
              <text:p text:style-name="P56"><text:span text:style-name="Source_20_Text"><text:span text:style-name="T9">IfStatement</text:span></text:span><text:span text:style-name="T9">: A legösszetettebb. Tárol egy </text:span><text:span text:style-name="Source_20_Text"><text:span text:style-name="T9">Expression</text:span></text:span><text:span text:style-name="T9">-t (a feltétel), egy </text:span><text:span text:style-name="Source_20_Text"><text:span text:style-name="T9">List&lt;Statement&gt;</text:span></text:span><text:span text:style-name="T9">-et (a "then" ág) és egy másik </text:span><text:span text:style-name="Source_20_Text"><text:span text:style-name="T9">List&lt;Statement&gt;</text:span></text:span><text:span text:style-name="T9">-et (az "else" ág).</text:span></text:p>
            </text:list-item>
          </text:list>
        </text:list-item>
      </text:list>
      <text:p text:style-name="P37"><text:span text:style-name="T9"/></text:p>
      <text:p text:style-name="P37"><text:soft-page-break/><text:span text:style-name="T10">3. A</text:span><text:span text:style-name="T11">z </text:span><text:span text:style-name="T10">Elemző – </text:span><text:span text:style-name="T11">Parser </text:span><text:span text:style-name="T14">osztály</text:span><text:span text:style-name="T10">: </text:span><text:span text:style-name="T9"><text:s/>A </text:span><text:span text:style-name="Source_20_Text"><text:span text:style-name="T9">Parser.java</text:span></text:span><text:span text:style-name="T9"> osztály a rendszer "agya". </text:span><text:span text:style-name="T10">Tervezési döntés</text:span><text:span text:style-name="T9"> volt, hogy a </text:span><text:span text:style-name="T24">lexikális elemzést (lexing)</text:span><text:span text:style-name="T9"> és a </text:span><text:span text:style-name="T24">szintaktikai elemzést (parsing)</text:span><text:span text:style-name="T9"> nem </text:span><text:span text:style-name="T23">választottam</text:span><text:span text:style-name="T9"> szét mereven két külön komponensre, hanem a Parser felel mindkettőért.</text:span></text:p>
      <text:list text:style-name="L8">
        <text:list-item>
          <text:p text:style-name="P57"><text:span text:style-name="T9">A </text:span><text:span text:style-name="Source_20_Text"><text:span text:style-name="T9">parseStatementBlock()</text:span></text:span><text:span text:style-name="T9"> metódus rekurzívan olvassa a kódsorokat, és felismeri a blokk-szerkezeteket (</text:span><text:span text:style-name="Source_20_Text"><text:span text:style-name="T9">if</text:span></text:span><text:span text:style-name="T9">...</text:span><text:span text:style-name="Source_20_Text"><text:span text:style-name="T9">endif</text:span></text:span><text:span text:style-name="T9">).</text:span></text:p>
        </text:list-item>
        <text:list-item>
          <text:p text:style-name="P57"><text:span text:style-name="T9">A </text:span><text:span text:style-name="Source_20_Text"><text:span text:style-name="T9">parseExpression()</text:span></text:span><text:span text:style-name="T9"> metódus felel a kifejezések (pl. </text:span><text:span text:style-name="Source_20_Text"><text:span text:style-name="T9">(x + 5) * "hello"</text:span></text:span><text:span text:style-name="T9">) tokenizálásáért és AST-vé alakításáért. Ehhez egy </text:span><text:span text:style-name="T10">Recursive Descent</text:span><text:span text:style-name="T9"> (rekurzív leszállásos) elemzési stratégiát használ, amely természetes módon kezeli a műveleti sorrendet és a zárójelezést.</text:span></text:p>
        </text:list-item>
      </text:list>
      <text:p text:style-name="P37"><text:span text:style-name="T9"/></text:p>
      <text:p text:style-name="P37"><text:span text:style-name="T10">4. A Környezet </text:span><text:span text:style-name="T12">(Memória) </text:span><text:span text:style-name="T10">– Environment </text:span><text:span text:style-name="T14">osztály</text:span><text:span text:style-name="T10">: </text:span><text:span text:style-name="T9">Az </text:span><text:span text:style-name="Source_20_Text"><text:span text:style-name="T9">Environment.java</text:span></text:span><text:span text:style-name="T9"> egy egyszerű osztály, ami egy </text:span><text:span text:style-name="Source_20_Text"><text:span text:style-name="T9">HashMap&lt;String, Object&gt;</text:span></text:span><text:span text:style-name="T9">-et burkol. Ez felel a változók tárolásáért futás közben. Az </text:span><text:span text:style-name="Source_20_Text"><text:span text:style-name="T9">evaluate()</text:span></text:span><text:span text:style-name="T9"> és </text:span><text:span text:style-name="Source_20_Text"><text:span text:style-name="T9">execute()</text:span></text:span><text:span text:style-name="T9"> metódusok ezt kapják paraméterként, hogy hozzáférjenek a változók állapotához.</text:span></text:p>
      <text:p text:style-name="P37"><text:span text:style-name="T9"/></text:p>
      <text:p text:style-name="P37"><text:span text:style-name="T10">5. A Főprogram - MiniInterpreter: </text:span><text:span text:style-name="T9">Ez az alkalmazás belépési pontja. Felelős a </text:span><text:span text:style-name="Source_20_Text"><text:span text:style-name="T9">.mini</text:span></text:span><text:span text:style-name="T9"> fájl nevének parancssori argumentumként való fogadásáért, a fájl beolvasásáért, a </text:span><text:span text:style-name="Source_20_Text"><text:span text:style-name="T9">Parser</text:span></text:span><text:span text:style-name="T9"> példányosításáért, és a kapott </text:span><text:span text:style-name="Source_20_Text"><text:span text:style-name="T9">List&lt;Statement&gt;</text:span></text:span><text:span text:style-name="T9"> (az AST gyökereinek listája) végrehajtásának elindításáért.</text:span></text:p>
      <text:p text:style-name="P37"><text:span text:style-name="T9"/></text:p>
      <text:h text:style-name="P7" text:outline-level="4"><text:bookmark-start text:name="__RefHeading___Toc893_2130702120"/>4.2. Tervezési Döntések:<text:bookmark-end text:name="__RefHeading___Toc893_2130702120"/></text:h>
      <text:list text:style-name="L9">
        <text:list-item>
          <text:p text:style-name="P58"><text:span text:style-name="T10">Miért </text:span><text:span text:style-name="Source_20_Text"><text:span text:style-name="T10">Object</text:span></text:span><text:span text:style-name="T10"> a típus?</text:span><text:span text:style-name="T9"> A nyelv eleinte csak </text:span><text:span text:style-name="Source_20_Text"><text:span text:style-name="T9">double</text:span></text:span><text:span text:style-name="T9"> típusokat kezelt. A </text:span><text:span text:style-name="Source_20_Text"><text:span text:style-name="T9">String</text:span></text:span><text:span text:style-name="T9">-ek bevezetésekor dönteni kellett: vagy bonyolult típusellenőrző rendszert </text:span><text:span text:style-name="T25">építek</text:span><text:span text:style-name="T9">, vagy egy egyszerűbb, "dinamikusabb" utat </text:span><text:span text:style-name="T25">választok</text:span><text:span text:style-name="T9">. Az </text:span><text:span text:style-name="Source_20_Text"><text:span text:style-name="T9">Object</text:span></text:span><text:span text:style-name="T9"> használata (ahol az érték lehet </text:span><text:span text:style-name="Source_20_Text"><text:span text:style-name="T9">Double</text:span></text:span><text:span text:style-name="T9"> vagy </text:span><text:span text:style-name="Source_20_Text"><text:span text:style-name="T9">String</text:span></text:span><text:span text:style-name="T9">) lehetővé tette, hogy a </text:span><text:span text:style-name="Source_20_Text"><text:span text:style-name="T9">Environment</text:span></text:span><text:span text:style-name="T9"> és a kifejezések rugalmasan kezeljék mindkét típust. </text:span><text:span text:style-name="T10">Kompromisszum:</text:span><text:span text:style-name="T9"> Emiatt a típusellenőrzést futásidőben (</text:span><text:span text:style-name="Source_20_Text"><text:span text:style-name="T9">instanceof</text:span></text:span><text:span text:style-name="T9">) kell elvégezni a műveleteket végző osztályokban (pl. </text:span><text:span text:style-name="Source_20_Text"><text:span text:style-name="T9">BinaryExpression</text:span></text:span><text:span text:style-name="T9">).</text:span></text:p>
        </text:list-item>
        <text:list-item>
          <text:p text:style-name="P58"><text:span text:style-name="T10">Miért </text:span><text:span text:style-name="Source_20_Text"><text:span text:style-name="T10">if-then-else-endif</text:span></text:span><text:span text:style-name="T10">?</text:span><text:span text:style-name="T9"> Sok modern nyelv (pl. Java, C) kapcsos zárójeleket (</text:span><text:span text:style-name="Source_20_Text"><text:span text:style-name="T9">{ }</text:span></text:span><text:span text:style-name="T9">) használ a blokkok jelölésére. A</text:span><text:span text:style-name="T26">z én</text:span><text:span text:style-name="T9"> parser</text:span><text:span text:style-name="T26">em</text:span><text:span text:style-name="T9"> egyszerűsége érdekében egy egyértelműbb, kulcsszó-alapú lezárást (</text:span><text:span text:style-name="Source_20_Text"><text:span text:style-name="T27">endif</text:span></text:span><text:span text:style-name="T9">) </text:span><text:span text:style-name="T26">választottam</text:span><text:span text:style-name="T9">. Ez drasztikusan leegyszerűsítette a </text:span><text:span text:style-name="Source_20_Text"><text:span text:style-name="T9">Parser</text:span></text:span><text:span text:style-name="T9"> logikáját, mivel nem kell a behúzásokat vagy a zárójelek párosítását figyelnie.</text:span></text:p>
        </text:list-item>
        <text:list-item>
          <text:p text:style-name="P58"><text:soft-page-break/><text:span text:style-name="T10">Miért egybeépített Lexer és Parser?</text:span><text:span text:style-name="T9"> Egy professzionális fordítóprogramban a Lexer és a Parser szigorúan különálló komponensek. Egy ilyen kis nyelv esetében azonban ez felesleges bonyolítást jelentett volna. A kifejezések elemzését végző </text:span><text:span text:style-name="Source_20_Text"><text:span text:style-name="T9">tokenizeExpression</text:span></text:span><text:span text:style-name="T9"> metódus (ami lényegében egy mini-lexer) beágyazása a </text:span><text:span text:style-name="Source_20_Text"><text:span text:style-name="T9">Parser</text:span></text:span><text:span text:style-name="T9"> osztályba pragmatikus döntés volt.</text:span></text:p>
          <text:p text:style-name="P58"><text:span text:style-name="T9"/></text:p>
        </text:list-item>
      </text:list>
      <text:h text:style-name="P17" text:outline-level="3"><text:bookmark-start text:name="__RefHeading___Toc916_2130702120"/>4.3. A Projekt Osztályszerkezete és Fájljai:<text:bookmark-end text:name="__RefHeading___Toc916_2130702120"/></text:h>
      <text:p text:style-name="P19">A "MiniNyelv" interpreter 13 darab Java forrásfájlból épül fel. Az alábbiakban ezen osztályok és interfészek rövid ismertetése olvasható, funkcionális csoportokba rendezve.</text:p>
      <text:p text:style-name="P19"/>
      <text:h text:style-name="P18" text:outline-level="4"><text:bookmark-start text:name="__RefHeading___Toc918_2130702120"/>A. Rendszerkomponensek (Core System):<text:bookmark-end text:name="__RefHeading___Toc918_2130702120"/></text:h>
      <text:p text:style-name="P19">Ezek az osztályok alkotják az interpreter "keretrendszerét", ők végzik a vezérlést és az adattárolást.</text:p>
      <text:list text:style-name="L10">
        <text:list-item>
          <text:p text:style-name="P59"><text:span text:style-name="Source_20_Text"><text:span text:style-name="T16">MiniInterpreter.java</text:span></text:span><text:span text:style-name="T16"> (Főprogram):</text:span></text:p>
          <text:list>
            <text:list-item>
              <text:p text:style-name="P59"><text:span text:style-name="T17">Ez </text:span><text:span text:style-name="T22">az alkalmazás belépési pontja</text:span><text:span text:style-name="T17"> (</text:span><text:span text:style-name="Source_20_Text"><text:span text:style-name="T17">main</text:span></text:span><text:span text:style-name="T17"> metódus).</text:span></text:p>
            </text:list-item>
            <text:list-item>
              <text:p text:style-name="P59"><text:span text:style-name="T17">Feladata a parancssori argumentumok ellenőrzése, a megadott </text:span><text:span text:style-name="Source_20_Text"><text:span text:style-name="T17">.mini</text:span></text:span><text:span text:style-name="T17"> forrásfájl beolvasása, a </text:span><text:span text:style-name="Source_20_Text"><text:span text:style-name="T17">Parser</text:span></text:span><text:span text:style-name="T17"> példányosítása, és a kapott parancslista végrehajtásának elindítása.</text:span></text:p>
            </text:list-item>
            <text:list-item>
              <text:p text:style-name="P75">Kezeli a fájlrendszerbeli (IO) kivételeket.</text:p>
              <text:p text:style-name="P75"/>
            </text:list-item>
          </text:list>
        </text:list-item>
        <text:list-item>
          <text:p text:style-name="P59"><text:span text:style-name="Source_20_Text"><text:span text:style-name="T16">Parser.java</text:span></text:span><text:span text:style-name="T16"> (Elemző):</text:span></text:p>
          <text:list>
            <text:list-item>
              <text:p text:style-name="P75">A rendszer legösszetettebb osztálya. Felelős <text:span text:style-name="T37">a nyers szöveges forráskód strukturált objektumokká (AST) alakításáért</text:span>.</text:p>
            </text:list-item>
            <text:list-item>
              <text:p text:style-name="P75">Tartalmazza a <text:span text:style-name="T37">lexikális elemzés</text:span> logikáját (tokenizálás, stringek és operátorok felismerése) és a <text:span text:style-name="T37">szintaktikai elemzést</text:span> (műveleti sorrend, blokk-szerkezetek kezelése).</text:p>
            </text:list-item>
            <text:list-item>
              <text:p text:style-name="P76">Rekurzív leszállásos (Recursive Descent) algoritmust alkalmaz, <text:span text:style-name="T38">amely e</text:span>gy felülről lefelé haladó elemző, amely a bemenetet rekurzív függvények halmaza alapján <text:soft-page-break/>dolgozza fel, ahol minden függvény egy nyelvtani szabálynak felel meg. <text:span text:style-name="T39">(*https://www.geeksforgeeks.org/compiler-design/recursive-descent-parser/)</text:span></text:p>
              <text:p text:style-name="P75"/>
            </text:list-item>
          </text:list>
        </text:list-item>
        <text:list-item>
          <text:p text:style-name="P59"><text:span text:style-name="Source_20_Text"><text:span text:style-name="T16">Environment.java</text:span></text:span><text:span text:style-name="T16"> (Környezet):</text:span></text:p>
          <text:list>
            <text:list-item>
              <text:p text:style-name="P80">A program futásidejű állapotát tárolja.</text:p>
            </text:list-item>
            <text:list-item>
              <text:p text:style-name="P59"><text:span text:style-name="T17">Belsőleg egy </text:span><text:span text:style-name="Source_20_Text"><text:span text:style-name="T22">HashMap&lt;String, Object&gt;</text:span></text:span><text:span text:style-name="T22">-et használ a változók neveinek és aktuális értékeinek (Szám vagy String) párosítására.</text:span></text:p>
            </text:list-item>
            <text:list-item>
              <text:p text:style-name="P59"><text:span text:style-name="T17">Biztosítja a változók írását (</text:span><text:span text:style-name="Source_20_Text"><text:span text:style-name="T17">setVariable</text:span></text:span><text:span text:style-name="T17">) és olvasását (</text:span><text:span text:style-name="Source_20_Text"><text:span text:style-name="T17">getVariable</text:span></text:span><text:span text:style-name="T17">), valamint hibát dob ismeretlen változó esetén.</text:span></text:p>
              <text:p text:style-name="P59"><text:span text:style-name="T17"/></text:p>
            </text:list-item>
          </text:list>
        </text:list-item>
      </text:list>
      <text:h text:style-name="P18" text:outline-level="4"><text:bookmark-start text:name="__RefHeading___Toc920_2130702120"/>B. Interfészek (Interfaces):<text:bookmark-end text:name="__RefHeading___Toc920_2130702120"/></text:h>
      <text:p text:style-name="P19">Ezek definiálják az Interpreter Tervezési Minta közös szerződéseit.</text:p>
      <text:list text:style-name="L11">
        <text:list-item>
          <text:p text:style-name="P60"><text:span text:style-name="Source_20_Text"><text:span text:style-name="T16">Statement.java</text:span></text:span><text:span text:style-name="T16"> (Utasítás):</text:span></text:p>
          <text:list>
            <text:list-item>
              <text:p text:style-name="P77">Absztrakt interfész minden <text:span text:style-name="T37">olyan nyelvi elemhez, amely cselekvést hajt végre, de</text:span> <text:span text:style-name="T37">nem rendelkezik visszatérési értékkel</text:span> (pl. kiíratás, értékadás, elágazás).</text:p>
            </text:list-item>
            <text:list-item>
              <text:p text:style-name="P60"><text:span text:style-name="T17">Egyetlen metódusa: </text:span><text:span text:style-name="Source_20_Text"><text:span text:style-name="T17">void execute (Environment env)</text:span></text:span><text:span text:style-name="T17">.</text:span></text:p>
              <text:p text:style-name="P60"><text:span text:style-name="T17"/></text:p>
            </text:list-item>
          </text:list>
        </text:list-item>
        <text:list-item>
          <text:p text:style-name="P60"><text:span text:style-name="Source_20_Text"><text:span text:style-name="T16">Expression.java</text:span></text:span><text:span text:style-name="T16"> (Kifejezés):</text:span></text:p>
          <text:list>
            <text:list-item>
              <text:p text:style-name="P77">Absztrakt interfész minden olyan nyelvi elemhez, <text:span text:style-name="T37">amely kiértékelhető egy értékké (legyen az szám vagy szöveg)</text:span>.</text:p>
            </text:list-item>
            <text:list-item>
              <text:p text:style-name="P60"><text:span text:style-name="T17">Egyetlen metódusa: </text:span><text:span text:style-name="Source_20_Text"><text:span text:style-name="T17">Object evaluate(Environment env)</text:span></text:span><text:span text:style-name="T17">.</text:span></text:p>
              <text:p text:style-name="P60"><text:span text:style-name="T17"/></text:p>
            </text:list-item>
          </text:list>
        </text:list-item>
      </text:list>
      <text:h text:style-name="P18" text:outline-level="4"><text:bookmark-start text:name="__RefHeading___Toc922_2130702120"/>C. Utasítás Implementációk (Statements):<text:bookmark-end text:name="__RefHeading___Toc922_2130702120"/></text:h>
      <text:p text:style-name="P37"><text:span text:style-name="T17">A </text:span><text:span text:style-name="Source_20_Text"><text:span text:style-name="T17">Statement</text:span></text:span><text:span text:style-name="T17"> interfész konkrét megvalósításai.</text:span></text:p>
      <text:list text:style-name="L12">
        <text:list-item>
          <text:p text:style-name="P61"><text:span text:style-name="Source_20_Text"><text:span text:style-name="T16">VarAssignStatement.java</text:span></text:span><text:span text:style-name="T16">:</text:span></text:p>
          <text:list>
            <text:list-item>
              <text:p text:style-name="P61"><text:span text:style-name="T17">Felelős </text:span><text:span text:style-name="T22">a változók deklarációjáért (</text:span><text:span text:style-name="Source_20_Text"><text:span text:style-name="T22">var x = ...</text:span></text:span><text:span text:style-name="T22">) és értékadásáért (</text:span><text:span text:style-name="Source_20_Text"><text:span text:style-name="T22">x = ...</text:span></text:span><text:span text:style-name="T22">).</text:span></text:p>
            </text:list-item>
            <text:list-item>
              <text:p text:style-name="P61"><text:soft-page-break/><text:span text:style-name="T17">Kiértékeli a jobb oldali kifejezést, és az eredményt elmenti az </text:span><text:span text:style-name="Source_20_Text"><text:span text:style-name="T17">Environment</text:span></text:span><text:span text:style-name="T17">-be a megadott változónévvel.</text:span></text:p>
            </text:list-item>
          </text:list>
        </text:list-item>
      </text:list>
      <text:p text:style-name="P37"><text:span text:style-name="T17"/></text:p>
      <text:list text:continue-numbering="true" text:style-name="L12">
        <text:list-item>
          <text:p text:style-name="P61"><text:span text:style-name="Source_20_Text"><text:span text:style-name="T16">PrintStatement.java</text:span></text:span><text:span text:style-name="T16">:</text:span></text:p>
          <text:list>
            <text:list-item>
              <text:p text:style-name="P61"><text:span text:style-name="T22">A </text:span><text:span text:style-name="Source_20_Text"><text:span text:style-name="T22">print</text:span></text:span><text:span text:style-name="T22"> parancs megvalósítása.</text:span></text:p>
            </text:list-item>
            <text:list-item>
              <text:p text:style-name="P61"><text:span text:style-name="T17">Kiértékeli a hozzá tartozó kifejezést, és az eredményt (legyen az szám vagy szöveg) kiírja a standard kimenetre (</text:span><text:span text:style-name="Source_20_Text"><text:span text:style-name="T17">System.out</text:span></text:span><text:span text:style-name="T17">).</text:span></text:p>
              <text:p text:style-name="P61"><text:span text:style-name="T17"/></text:p>
            </text:list-item>
          </text:list>
        </text:list-item>
        <text:list-item>
          <text:p text:style-name="P61"><text:span text:style-name="Source_20_Text"><text:span text:style-name="T16">IfStatement.java</text:span></text:span><text:span text:style-name="T16">:</text:span></text:p>
          <text:list>
            <text:list-item>
              <text:p text:style-name="P61"><text:span text:style-name="T22">A vezérlési szerkezet megvalósítása (</text:span><text:span text:style-name="Source_20_Text"><text:span text:style-name="T22">if-then-else</text:span></text:span><text:span text:style-name="T22">).</text:span></text:p>
            </text:list-item>
            <text:list-item>
              <text:p text:style-name="P61"><text:span text:style-name="T17">Tárolja a feltételt (</text:span><text:span text:style-name="Source_20_Text"><text:span text:style-name="T17">Expression</text:span></text:span><text:span text:style-name="T17">) és két utasításlistát (igaz ág, hamis ág).</text:span></text:p>
            </text:list-item>
            <text:list-item>
              <text:p text:style-name="P78">Futásidőben ellenőrzi, hogy a feltétel érvényes szám-e, és ez alapján dönti el, melyik ágat hajtsa végre.</text:p>
              <text:p text:style-name="P78"/>
            </text:list-item>
          </text:list>
        </text:list-item>
      </text:list>
      <text:h text:style-name="P18" text:outline-level="4"><text:bookmark-start text:name="__RefHeading___Toc924_2130702120"/>D. Kifejezés Implementációk (Expressions):<text:bookmark-end text:name="__RefHeading___Toc924_2130702120"/></text:h>
      <text:p text:style-name="P37"><text:span text:style-name="T17">Az </text:span><text:span text:style-name="Source_20_Text"><text:span text:style-name="T17">Expression</text:span></text:span><text:span text:style-name="T17"> interfész konkrét megvalósításai. Ezek alkotják a "leveleket" és a számítási csomópontokat az AST-ben.</text:span></text:p>
      <text:list text:style-name="L13">
        <text:list-item>
          <text:p text:style-name="P62"><text:span text:style-name="Source_20_Text"><text:span text:style-name="T16">NumberExpression.java</text:span></text:span><text:span text:style-name="T16">:</text:span></text:p>
          <text:list>
            <text:list-item>
              <text:p text:style-name="P62"><text:span text:style-name="T17">Primitív numerikus literált (pl. </text:span><text:span text:style-name="Source_20_Text"><text:span text:style-name="T17">10</text:span></text:span><text:span text:style-name="T17">, </text:span><text:span text:style-name="Source_20_Text"><text:span text:style-name="T17">3.14</text:span></text:span><text:span text:style-name="T17">) csomagol be egy objektumba.</text:span></text:p>
            </text:list-item>
            <text:list-item>
              <text:p text:style-name="P62"><text:span text:style-name="T17">Visszatérési értéke önmaga (</text:span><text:span text:style-name="Source_20_Text"><text:span text:style-name="T17">Double</text:span></text:span><text:span text:style-name="T17">).</text:span></text:p>
              <text:p text:style-name="P62"><text:span text:style-name="T17"/></text:p>
            </text:list-item>
          </text:list>
        </text:list-item>
        <text:list-item>
          <text:p text:style-name="P62"><text:span text:style-name="Source_20_Text"><text:span text:style-name="T16">StringExpression.java</text:span></text:span><text:span text:style-name="T16">:</text:span></text:p>
          <text:list>
            <text:list-item>
              <text:p text:style-name="P62"><text:span text:style-name="T17">Szöveges literált (pl. </text:span><text:span text:style-name="Source_20_Text"><text:span text:style-name="T17">"Hello World"</text:span></text:span><text:span text:style-name="T17">) csomagol be.</text:span></text:p>
            </text:list-item>
            <text:list-item>
              <text:p text:style-name="P62"><text:span text:style-name="T17">Visszatérési értéke a tárolt </text:span><text:span text:style-name="Source_20_Text"><text:span text:style-name="T17">String</text:span></text:span><text:span text:style-name="T17">.</text:span></text:p>
              <text:p text:style-name="P62"><text:span text:style-name="T17"/></text:p>
            </text:list-item>
          </text:list>
        </text:list-item>
        <text:list-item>
          <text:p text:style-name="P62"><text:span text:style-name="Source_20_Text"><text:span text:style-name="T16">VariableExpression.java</text:span></text:span><text:span text:style-name="T16">:</text:span></text:p>
          <text:list>
            <text:list-item>
              <text:p text:style-name="P79"><text:soft-page-break/>Nem tárol értéket, csak egy változó nevét (azonosítót).</text:p>
            </text:list-item>
            <text:list-item>
              <text:p text:style-name="P62"><text:span text:style-name="T17">Kiértékeléskor megkeresi és visszaadja a változó aktuális értékét az </text:span><text:span text:style-name="Source_20_Text"><text:span text:style-name="T17">Environment</text:span></text:span><text:span text:style-name="T17">-ből.</text:span></text:p>
              <text:p text:style-name="P62"><text:span text:style-name="T17"/></text:p>
            </text:list-item>
          </text:list>
        </text:list-item>
        <text:list-item>
          <text:p text:style-name="P62"><text:span text:style-name="Source_20_Text"><text:span text:style-name="T16">BinaryExpression.java</text:span></text:span><text:span text:style-name="T16">:</text:span></text:p>
          <text:list>
            <text:list-item>
              <text:p text:style-name="P62"><text:span text:style-name="T17">Kétoperandusú műveleteket valósít meg (</text:span><text:span text:style-name="Source_20_Text"><text:span text:style-name="T17">+</text:span></text:span><text:span text:style-name="T17">, </text:span><text:span text:style-name="Source_20_Text"><text:span text:style-name="T17">-</text:span></text:span><text:span text:style-name="T17">, </text:span><text:span text:style-name="Source_20_Text"><text:span text:style-name="T17">*</text:span></text:span><text:span text:style-name="T17">, </text:span><text:span text:style-name="Source_20_Text"><text:span text:style-name="T17">/</text:span></text:span><text:span text:style-name="T17">).</text:span></text:p>
            </text:list-item>
            <text:list-item>
              <text:p text:style-name="P62"><text:span text:style-name="T17">Ez az osztály végzi a futásidejű típusellenőrzést is (pl. engedélyezi a stringek összefűzését </text:span><text:span text:style-name="Source_20_Text"><text:span text:style-name="T17">+</text:span></text:span><text:span text:style-name="T17">-szal, de tiltja a stringek szorzását).</text:span></text:p>
              <text:p text:style-name="P62"><text:span text:style-name="T17"/></text:p>
            </text:list-item>
          </text:list>
        </text:list-item>
        <text:list-item>
          <text:p text:style-name="P62"><text:span text:style-name="Source_20_Text"><text:span text:style-name="T16">ComparisonExpression.java</text:span></text:span><text:span text:style-name="T16">:</text:span></text:p>
          <text:list>
            <text:list-item>
              <text:p text:style-name="P62"><text:span text:style-name="T17">Logikai összehasonlításokat valósít meg (</text:span><text:span text:style-name="Source_20_Text"><text:span text:style-name="T17">==</text:span></text:span><text:span text:style-name="T17">, </text:span><text:span text:style-name="Source_20_Text"><text:span text:style-name="T17">!=</text:span></text:span><text:span text:style-name="T17">, </text:span><text:span text:style-name="Source_20_Text"><text:span text:style-name="T17">&lt;</text:span></text:span><text:span text:style-name="T17">, </text:span><text:span text:style-name="Source_20_Text"><text:span text:style-name="T17">&gt;</text:span></text:span><text:span text:style-name="T17">, stb.).</text:span></text:p>
            </text:list-item>
            <text:list-item>
              <text:p text:style-name="P62"><text:span text:style-name="T17">Az eredményt a nyelv konvenciójának megfelelően </text:span><text:span text:style-name="Source_20_Text"><text:span text:style-name="T17">1.0</text:span></text:span><text:span text:style-name="T17"> (igaz) vagy </text:span><text:span text:style-name="Source_20_Text"><text:span text:style-name="T17">0.0</text:span></text:span><text:span text:style-name="T17"> (hamis) értékű </text:span><text:span text:style-name="Source_20_Text"><text:span text:style-name="T17">Double</text:span></text:span><text:span text:style-name="T17">-ként adja vissza. Kezeli a különböző típusok (szám vs. string) összehasonlításának szabályait is.</text:span></text:p>
            </text:list-item>
          </text:list>
        </text:list-item>
      </text:list>
      <text:p text:style-name="P37"><text:span text:style-name="T17"/></text:p>
      <text:h text:style-name="P12" text:outline-level="3"><text:bookmark-start text:name="__RefHeading___Toc3273_2420637387"/>4.4. Memóriakezelés és Állapottér (Environment):<text:bookmark-end text:name="__RefHeading___Toc3273_2420637387"/></text:h>
      <text:p text:style-name="P14">A "MiniNyelv" interpreteres működéséből adódóan a program futásidejű adatait (runtime data) a gazdanyelv, jelen esetben a Java memóriaterületén (Heap) tárolja.</text:p>
      <text:p text:style-name="P32"><text:span text:style-name="T17">A nyelv memóriamodelljét az </text:span><text:span text:style-name="Source_20_Text"><text:span text:style-name="T17">Environment</text:span></text:span><text:span text:style-name="T17"> osztály valósítja meg, amely a fordítóprogramok elméletében ismert </text:span><text:span text:style-name="T16">Szimbólumtábla (Symbol Table)</text:span><text:span text:style-name="T17"> szerepét tölti be futásidőben.</text:span></text:p>
      <text:p text:style-name="P32"><text:span text:style-name="T17"/></text:p>
      <text:h text:style-name="P13" text:outline-level="4"><text:bookmark-start text:name="__RefHeading___Toc3275_2420637387"/>4.4.1. A Változók Tárolása<text:bookmark-end text:name="__RefHeading___Toc3275_2420637387"/></text:h>
      <text:p text:style-name="P39"><text:span text:style-name="T17">A memóriaterület szerkezete egy kulcs-érték párokat tároló adatszerkezetre épül. A Java </text:span><text:span text:style-name="Source_20_Text"><text:span text:style-name="T17">java.util.HashMap</text:span></text:span><text:span text:style-name="T17"> osztályát </text:span><text:span text:style-name="T19">használtam</text:span><text:span text:style-name="T17"> erre a célra, amely O(1) átlagos időbonyolultságú hozzáférést biztosít az adatokhoz. </text:span><text:span text:style-name="T20">(* </text:span><text:span text:style-name="T19">Az </text:span><text:span text:style-name="Source_20_Text"><text:span text:style-name="T19">O(1)</text:span></text:span><text:span text:style-name="T19"> jelölés a Nagy O (Big O) jelölésrendszerből származik, és konstans idejű </text:span><text:span text:style-name="T21">(nagyon gyors, nem lassul be)</text:span><text:span text:style-name="T19"> műveletet jelöl. Ez a gyakorlatban azt jelenti, hogy a változók elérése, olvasása vagy írása a </text:span><text:span text:style-name="Source_20_Text"><text:span text:style-name="T19">HashMap</text:span></text:span><text:span text:style-name="T19"> adatszerkezetben gyakorlatilag </text:span><text:soft-page-break/><text:span text:style-name="T19">ugyanannyi időt vesz igénybe, függetlenül attól, hogy a programban éppen 5 darab vagy 10 000 darab változó van definiálva.)</text:span></text:p>
      <text:list text:style-name="L14">
        <text:list-item>
          <text:p text:style-name="P63"><text:span text:style-name="T16">Kulcs (Key):</text:span><text:span text:style-name="T17"> A változó azonosítója (</text:span><text:span text:style-name="Source_20_Text"><text:span text:style-name="T17">String</text:span></text:span><text:span text:style-name="T17">).</text:span></text:p>
        </text:list-item>
        <text:list-item>
          <text:p text:style-name="P63"><draw:a xlink:type="simple" xlink:href="https://encrypted-tbn0.gstatic.com/licensed-image?q=tbn:ANd9GcQY8ewYAWK13DueEugDYLkp7MyS_Y0AH1uSbJYZTpJvj4BQhnfJmzw7COaDEA_7whGu27rGa4Ijm6VWcjYQwETeaQmseoL8e42fhZjJg4hjlNS-K84" office:target-frame-name="_blank" xlink:show="new"><draw:frame draw:style-name="fr1" draw:name="Kép1" text:anchor-type="paragraph" svg:x="5.129cm" svg:y="1.633cm" svg:width="6.188cm" svg:height="6.188cm" draw:z-index="0"><draw:image xlink:href="Pictures/10000000000007D0000007D070071AD5.jpg" xlink:type="simple" xlink:show="embed" xlink:actuate="onLoad" draw:mime-type="image/jpeg"/><svg:title>Kép erről: </svg:title></draw:frame></draw:a><text:span text:style-name="T16">Érték (Value):</text:span><text:span text:style-name="T17"> A változóban tárolt adat (</text:span><text:span text:style-name="Source_20_Text"><text:span text:style-name="T17">Object</text:span></text:span><text:span text:style-name="T17">). Mivel a nyelvünk dinamikusan típusos, ez az objektum lehet </text:span><text:span text:style-name="Source_20_Text"><text:span text:style-name="T17">java.lang.Double</text:span></text:span><text:span text:style-name="T17"> (szám) vagy </text:span><text:span text:style-name="Source_20_Text"><text:span text:style-name="T17">java.lang.String</text:span></text:span><text:span text:style-name="T17"> (szöveg). !!!</text:span><text:span text:style-name="T18">Kép forrása: </text:span><text:span text:style-name="T17">Shutterstock</text:span></text:p>
        </text:list-item>
      </text:list>
      <text:p text:style-name="P21"/>
      <text:p text:style-name="P21">Példa a memória állapotára:</text:p>
      <text:p text:style-name="P14">Tegyük fel, hogy a következő MiniNyelv kód fut:</text:p>
      <text:p text:style-name="P29"><text:span text:style-name="Source_20_Text"><text:span text:style-name="T17">var pi = 3.14</text:span></text:span></text:p>
      <text:p text:style-name="P35"><text:span text:style-name="Source_20_Text"><text:span text:style-name="T17">var koszonto = "Szia!"</text:span></text:span></text:p>
      <text:p text:style-name="P35"><text:span text:style-name="Source_20_Text"><text:span text:style-name="T17">var x = 10</text:span></text:span></text:p>
      <text:p text:style-name="P35"><text:span text:style-name="Source_20_Text"><text:span text:style-name="T17"/></text:span></text:p>
      <text:p text:style-name="P32"><text:span text:style-name="T17">Ekkor az </text:span><text:span text:style-name="Source_20_Text"><text:span text:style-name="T17">Environment</text:span></text:span><text:span text:style-name="T17"> objektum belső </text:span><text:span text:style-name="Source_20_Text"><text:span text:style-name="T17">HashMap</text:span></text:span><text:span text:style-name="T17">-je a következőképpen néz ki a Java memóriájában:</text:span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header-rows>
          <table:table-row>
            <table:table-cell table:style-name="Táblázat1.A1" office:value-type="string">
              <text:p text:style-name="P30"><text:span text:style-name="Strong_20_Emphasis"><text:span text:style-name="T17">Változónév (Key)</text:span></text:span></text:p>
            </table:table-cell>
            <table:table-cell table:style-name="Táblázat1.A1" office:value-type="string">
              <text:p text:style-name="P30"><text:span text:style-name="Strong_20_Emphasis"><text:span text:style-name="T17">Tárolt Érték (Value - Object)</text:span></text:span></text:p>
            </table:table-cell>
            <table:table-cell table:style-name="Táblázat1.A1" office:value-type="string">
              <text:p text:style-name="P30"><text:span text:style-name="Strong_20_Emphasis"><text:span text:style-name="T17">Tényleges Típus</text:span></text:span></text:p>
            </table:table-cell>
          </table:table-row>
        </table:table-header-rows>
        <table:table-row>
          <table:table-cell table:style-name="Táblázat1.A1" office:value-type="string">
            <text:p text:style-name="P31"><text:span text:style-name="Source_20_Text"><text:span text:style-name="T17">"pi"</text:span></text:span></text:p>
          </table:table-cell>
          <table:table-cell table:style-name="Táblázat1.A1" office:value-type="string">
            <text:p text:style-name="P31"><text:span text:style-name="Source_20_Text"><text:span text:style-name="T17">3.14</text:span></text:span></text:p>
          </table:table-cell>
          <table:table-cell table:style-name="Táblázat1.A1" office:value-type="string">
            <text:p text:style-name="P31"><text:span text:style-name="Source_20_Text"><text:span text:style-name="T17">Double</text:span></text:span></text:p>
          </table:table-cell>
        </table:table-row>
        <table:table-row>
          <table:table-cell table:style-name="Táblázat1.A1" office:value-type="string">
            <text:p text:style-name="P31"><text:span text:style-name="Source_20_Text"><text:span text:style-name="T17">"koszonto"</text:span></text:span></text:p>
          </table:table-cell>
          <table:table-cell table:style-name="Táblázat1.A1" office:value-type="string">
            <text:p text:style-name="P31"><text:span text:style-name="Source_20_Text"><text:span text:style-name="T17">"Szia!"</text:span></text:span></text:p>
          </table:table-cell>
          <table:table-cell table:style-name="Táblázat1.A1" office:value-type="string">
            <text:p text:style-name="P31"><text:span text:style-name="Source_20_Text"><text:span text:style-name="T17">String</text:span></text:span></text:p>
          </table:table-cell>
        </table:table-row>
        <table:table-row>
          <table:table-cell table:style-name="Táblázat1.A1" office:value-type="string">
            <text:p text:style-name="P31"><text:span text:style-name="Source_20_Text"><text:span text:style-name="T17">"x"</text:span></text:span></text:p>
          </table:table-cell>
          <table:table-cell table:style-name="Táblázat1.A1" office:value-type="string">
            <text:p text:style-name="P31"><text:span text:style-name="Source_20_Text"><text:span text:style-name="T17">10.0</text:span></text:span></text:p>
          </table:table-cell>
          <table:table-cell table:style-name="Táblázat1.A1" office:value-type="string">
            <text:p text:style-name="P31"><text:span text:style-name="Source_20_Text"><text:span text:style-name="T17">Double</text:span></text:span></text:p>
          </table:table-cell>
        </table:table-row>
      </table:table>
      <text:h text:style-name="P13" text:outline-level="4"><text:soft-page-break/></text:h>
      <text:h text:style-name="P13" text:outline-level="4"><text:bookmark-start text:name="__RefHeading___Toc3277_2420637387"/>4.4.2. Élettartam (Scope):<text:bookmark-end text:name="__RefHeading___Toc3277_2420637387"/></text:h>
      <text:p text:style-name="P32"><text:span text:style-name="T17">Jelen implementációban a memória </text:span><text:span text:style-name="T16">globális</text:span><text:span text:style-name="T17">. Az </text:span><text:span text:style-name="Source_20_Text"><text:span text:style-name="T17">Environment</text:span></text:span><text:span text:style-name="T17"> példányosítása a program indulásakor (</text:span><text:span text:style-name="Source_20_Text"><text:span text:style-name="T17">MiniInterpreter.main</text:span></text:span><text:span text:style-name="T17">) történik, és a program futásának végéig létezik.</text:span></text:p>
      <text:list text:style-name="L15">
        <text:list-item>
          <text:p text:style-name="P64"><text:span text:style-name="T16">Létrejötte:</text:span><text:span text:style-name="T17"> Amikor az interpreter elindul (</text:span><text:span text:style-name="Source_20_Text"><text:span text:style-name="T17">new Environment()</text:span></text:span><text:span text:style-name="T17">).</text:span></text:p>
        </text:list-item>
        <text:list-item>
          <text:p text:style-name="P64"><text:span text:style-name="T16">Módosulása:</text:span><text:span text:style-name="T17"> Amikor egy </text:span><text:span text:style-name="Source_20_Text"><text:span text:style-name="T17">VarAssignStatement</text:span></text:span><text:span text:style-name="T17"> (</text:span><text:span text:style-name="Source_20_Text"><text:span text:style-name="T17">var x = ...</text:span></text:span><text:span text:style-name="T17"> vagy </text:span><text:span text:style-name="Source_20_Text"><text:span text:style-name="T17">x = ...</text:span></text:span><text:span text:style-name="T17">) lefut.</text:span></text:p>
        </text:list-item>
        <text:list-item>
          <text:p text:style-name="P64"><text:span text:style-name="T16">Megszűnése:</text:span><text:span text:style-name="T17"> Amikor a program lefut, a Java Garbage Collector (Szemétgyűjtő) felszabadítja az </text:span><text:span text:style-name="Source_20_Text"><text:span text:style-name="T17">Environment</text:span></text:span><text:span text:style-name="T17"> objektumot és a benne tárolt összes változót.</text:span></text:p>
          <text:p text:style-name="P64"><text:span text:style-name="T17"/></text:p>
        </text:list-item>
      </text:list>
      <text:h text:style-name="P10" text:outline-level="2"><text:bookmark-start text:name="__RefHeading___Toc3395_2420637387"/>5. A Rendszer Fordítása és Futtatása<text:bookmark-end text:name="__RefHeading___Toc3395_2420637387"/></text:h>
      <text:p text:style-name="P37"><text:span text:style-name="T17">Ez a fejezet bemutatja, hogyan lehet a Java nyelven megírt interpretert lefordítani, illetve hogyan lehet vele egy saját, </text:span><text:span text:style-name="Source_20_Text"><text:span text:style-name="T17">.mini</text:span></text:span><text:span text:style-name="T17"> kiterjesztésű forrásfájlt végrehajtani. A műveletek elvégzéséhez parancssori környezet (Terminal vagy Command Prompt) és telepített Java Development Kit (JDK) szükséges.</text:span></text:p>
      <text:p text:style-name="P37"><text:span text:style-name="T17"/></text:p>
      <text:h text:style-name="P17" text:outline-level="3"><text:bookmark-start text:name="__RefHeading___Toc3397_2420637387"/>5.1. Könyvtárszerkezet:<text:bookmark-end text:name="__RefHeading___Toc3397_2420637387"/></text:h>
      <text:p text:style-name="P37"><text:span text:style-name="T17">A fordítás és futtatás előtt elengedhetetlen a megfelelő könyvtárszerkezet ellenőrzése. Mivel a projekt az </text:span><text:span text:style-name="Source_20_Text"><text:span text:style-name="T17">org.example</text:span></text:span><text:span text:style-name="T17"> csomagot használja, a parancsokat mindig a </text:span><text:span text:style-name="T16">projekt gyökérkönyvtárából</text:span><text:span text:style-name="T17"> (root directory) kell kiadni, amely tartalmazza az </text:span><text:span text:style-name="Source_20_Text"><text:span text:style-name="T17">org</text:span></text:span><text:span text:style-name="T17"> mappát és a futtatandó </text:span><text:span text:style-name="Source_20_Text"><text:span text:style-name="T17">.mini</text:span></text:span><text:span text:style-name="T17"> fájlt.</text:span></text:p>
      <text:p text:style-name="P37"><text:span text:style-name="T17"/></text:p>
      <text:p text:style-name="P19">A helyes könyvtárszerkezet a következő:</text:p>
      <text:p text:style-name="P33"><text:span text:style-name="Source_20_Text"><text:span text:style-name="T17">ProjektGyökér/</text:span></text:span></text:p>
      <text:p text:style-name="P33"><text:span text:style-name="Source_20_Text"><text:span text:style-name="T17">├── teszt.mini <text:s text:c="15"/>(A futtatandó mini-program)</text:span></text:span></text:p>
      <text:p text:style-name="P33"><text:span text:style-name="Source_20_Text"><text:span text:style-name="T17">└── org/</text:span></text:span></text:p>
      <text:p text:style-name="P33"><text:span text:style-name="Source_20_Text"><text:span text:style-name="T17"><text:s text:c="4"/>└── example/</text:span></text:span></text:p>
      <text:p text:style-name="P33"><text:span text:style-name="Source_20_Text"><text:span text:style-name="T17"><text:s text:c="8"/>├── MiniInterpreter.java</text:span></text:span></text:p>
      <text:p text:style-name="P33"><text:span text:style-name="Source_20_Text"><text:span text:style-name="T17"><text:s text:c="8"/>├── Parser.java</text:span></text:span></text:p>
      <text:p text:style-name="P33"><text:span text:style-name="Source_20_Text"><text:span text:style-name="T17"><text:s text:c="8"/>├── Environment.java</text:span></text:span></text:p>
      <text:p text:style-name="P34"><text:soft-page-break/><text:span text:style-name="Source_20_Text"><text:span text:style-name="T17"><text:s text:c="8"/>└── ... (többi .java fájl)</text:span></text:span></text:p>
      <text:p text:style-name="P34"><text:span text:style-name="Source_20_Text"><text:span text:style-name="T17"/></text:span></text:p>
      <text:h text:style-name="P17" text:outline-level="3"><text:bookmark-start text:name="__RefHeading___Toc3399_2420637387"/>5.2. Az Interpreter Fordítása (Compilation):<text:bookmark-end text:name="__RefHeading___Toc3399_2420637387"/></text:h>
      <text:p text:style-name="P37"><text:span text:style-name="T17">Mielőtt használni tudnánk a "MiniNyelv" interpretert, a Java forráskódokat (</text:span><text:span text:style-name="Source_20_Text"><text:span text:style-name="T17">.java</text:span></text:span><text:span text:style-name="T17">) le kell fordítanunk a Java Virtuális Gép (JVM) által értelmezhető bájtkódra (</text:span><text:span text:style-name="Source_20_Text"><text:span text:style-name="T17">.class</text:span></text:span><text:span text:style-name="T17">).</text:span></text:p>
      <text:p text:style-name="P22">A fordítás parancsa:</text:p>
      <text:p text:style-name="P16">Bash</text:p>
      <text:p text:style-name="P34"><text:span text:style-name="Source_20_Text"><text:span text:style-name="T17">javac org/example/*.java</text:span></text:span></text:p>
      <text:p text:style-name="P22">A parancs magyarázata:</text:p>
      <text:list text:style-name="L16">
        <text:list-item>
          <text:p text:style-name="P65"><text:span text:style-name="Source_20_Text"><text:span text:style-name="T17">javac</text:span></text:span><text:span text:style-name="T17">: A Java fordítóprogram meghívása.</text:span></text:p>
        </text:list-item>
        <text:list-item>
          <text:p text:style-name="P65"><text:span text:style-name="Source_20_Text"><text:span text:style-name="T17">org/example/*.java</text:span></text:span><text:span text:style-name="T17">: Utasítja a fordítót, hogy az </text:span><text:span text:style-name="Source_20_Text"><text:span text:style-name="T17">org/example</text:span></text:span><text:span text:style-name="T17"> mappában található </text:span><text:span text:style-name="T16">összes</text:span><text:span text:style-name="T17"> </text:span><text:span text:style-name="Source_20_Text"><text:span text:style-name="T17">.java</text:span></text:span><text:span text:style-name="T17"> kiterjesztésű fájlt fordítsa le.</text:span></text:p>
        </text:list-item>
      </text:list>
      <text:p text:style-name="P37"><text:span text:style-name="T17">Ha a fordítás sikeres, a terminál nem ad vissza üzenetet, de az </text:span><text:span text:style-name="Source_20_Text"><text:span text:style-name="T17">org/example</text:span></text:span><text:span text:style-name="T17"> mappában megjelennek a </text:span><text:span text:style-name="Source_20_Text"><text:span text:style-name="T17">.class</text:span></text:span><text:span text:style-name="T17"> kiterjesztésű fájlok.</text:span></text:p>
      <text:p text:style-name="P37"><text:span text:style-name="T17"/></text:p>
      <text:h text:style-name="P17" text:outline-level="3"><text:bookmark-start text:name="__RefHeading___Toc3401_2420637387"/>5.3. A Mini Program Futtatása (Execution):<text:bookmark-end text:name="__RefHeading___Toc3401_2420637387"/></text:h>
      <text:p text:style-name="P37"><text:span text:style-name="T17">A sikeres fordítás után az interpreter készen áll a használatra. A futtatáshoz a Java futtatókörnyezetet (</text:span><text:span text:style-name="Source_20_Text"><text:span text:style-name="T17">java</text:span></text:span><text:span text:style-name="T17">) használjuk, amelynek argumentumként megadjuk az interpreter főosztályát és a végrehajtandó </text:span><text:span text:style-name="Source_20_Text"><text:span text:style-name="T17">.mini</text:span></text:span><text:span text:style-name="T17"> fájl nevét.</text:span></text:p>
      <text:p text:style-name="P22">A futtatás parancsa:</text:p>
      <text:p text:style-name="P16">Bash</text:p>
      <text:p text:style-name="P34"><text:span text:style-name="Source_20_Text"><text:span text:style-name="T17">java org.example.MiniInterpreter teszt.mini</text:span></text:span></text:p>
      <text:p text:style-name="P22">A parancs részletes magyarázata:</text:p>
      <text:list text:style-name="L17">
        <text:list-item>
          <text:p text:style-name="P66"><text:span text:style-name="Source_20_Text"><text:span text:style-name="T17">java</text:span></text:span><text:span text:style-name="T17">: Elindítja a Java Virtuális Gépet (JVM).</text:span></text:p>
        </text:list-item>
        <text:list-item>
          <text:p text:style-name="P66"><text:soft-page-break/><text:span text:style-name="Source_20_Text"><text:span text:style-name="T17">org.example.MiniInterpreter</text:span></text:span><text:span text:style-name="T17">: Megnevezi a futtatandó főosztályt (Main Class). Fontos a </text:span><text:span text:style-name="T16">teljes minősített név</text:span><text:span text:style-name="T17"> használata (csomagnév + osztálynév), ponttal elválasztva.</text:span></text:p>
        </text:list-item>
        <text:list-item>
          <text:p text:style-name="P66"><text:span text:style-name="Source_20_Text"><text:span text:style-name="T17">teszt.mini</text:span></text:span><text:span text:style-name="T17">: </text:span><text:span text:style-name="T16">Parancssori argumentumként</text:span><text:span text:style-name="T17"> átadjuk a feldolgozandó forrásfájl nevét. A </text:span><text:span text:style-name="Source_20_Text"><text:span text:style-name="T17">MiniInterpreter</text:span></text:span><text:span text:style-name="T17"> osztály </text:span><text:span text:style-name="Source_20_Text"><text:span text:style-name="T17">main</text:span></text:span><text:span text:style-name="T17"> metódusa ezt a fájlnevet fogja beolvasni és átadni a Parsernek.</text:span></text:p>
        </text:list-item>
      </text:list>
      <text:h text:style-name="P17" text:outline-level="3"><text:bookmark-start text:name="__RefHeading___Toc3403_2420637387"/>5.4. Várt Kimenet<text:bookmark-end text:name="__RefHeading___Toc3403_2420637387"/></text:h>
      <text:p text:style-name="P37"><text:span text:style-name="T17">Ha a </text:span><text:span text:style-name="Source_20_Text"><text:span text:style-name="T17">teszt.mini</text:span></text:span><text:span text:style-name="T17"> fájl helyes szintaxisú kódot tartalmaz, az eredmény azonnal megjelenik a konzolon.</text:span></text:p>
      <text:p text:style-name="P19">Példa a sikeres futtatásra:</text:p>
      <text:p text:style-name="P20">teszt.mini fájl:</text:p>
      <text:p text:style-name="P33"><text:span text:style-name="Source_20_Text"><text:span text:style-name="T17">--- MiniNyelv futtatása: teszt.mini ---</text:span></text:span></text:p>
      <text:p text:style-name="P41" loext:marker-style-name="T40"><text:span text:style-name="Source_20_Text"><text:span text:style-name="T42">var a = 20</text:span></text:span><text:span text:style-name="T41"><text:line-break/>var b = 10<text:line-break/><text:line-break/>print a * b <text:s text:c="2"/># Eredmény: 200<text:line-break/><text:line-break/>if (a &gt; b) then<text:line-break/> <text:s/>print "A nagyobb mint B"<text:line-break/><text:line-break/> <text:s/>if ( (a / b) == 2 ) then<text:line-break/> <text:s text:c="4"/>print "A kétszerese B-nek"<text:line-break/> <text:s/>endif<text:line-break/>else<text:line-break/> <text:s/>print "B nagyobb mint A"<text:line-break/>endif<text:line-break/><text:line-break/>print "Program vége!"</text:span></text:p>
      <text:p text:style-name="P36"><text:span text:style-name="Source_20_Text"><text:span text:style-name="T17"/></text:span></text:p>
      <text:p text:style-name="P34"><text:span text:style-name="Source_20_Text"><text:span text:style-name="T17">--- Futtatás vége ---</text:span></text:span></text:p>
      <text:p text:style-name="P37"><text:span text:style-name="T17">Hiba esetén (pl. szintaktikai hiba a </text:span><text:span text:style-name="Source_20_Text"><text:span text:style-name="T17">.mini</text:span></text:span><text:span text:style-name="T17"> fájlban vagy hiányzó fájl) a program kivételt (Exception) dob, és hibaüzenettel tájékoztatja a felhasználót a probléma jellegéről.</text:span></text:p>
      <text:p text:style-name="P15"/>
      <text:h text:style-name="P11" text:outline-level="2"><text:bookmark-start text:name="__RefHeading___Toc895_2130702120"/>6. Összegzés és további fejlesztési lehetőségek<text:bookmark-end text:name="__RefHeading___Toc895_2130702120"/></text:h>
      <text:p text:style-name="P9"/>
      <text:p text:style-name="P9">A "MiniNyelv" <text:span text:style-name="T33">szak</text:span><text:span text:style-name="T32">dolgozatom</text:span> sikeresen demonstrálta egy programozási nyelv interpreterének alapvető felépítését és működését. A jelenlegi implementáció egy stabil alapot biztosít, amely számos irányba bővíthető:</text:p>
      <text:list text:style-name="L18">
        <text:list-item>
          <text:p text:style-name="P67"><text:soft-page-break/><text:span text:style-name="T10">Ciklusok:</text:span><text:span text:style-name="T9"> </text:span><text:span text:style-name="Source_20_Text"><text:span text:style-name="T9">while</text:span></text:span><text:span text:style-name="T9"> vagy </text:span><text:span text:style-name="Source_20_Text"><text:span text:style-name="T9">for</text:span></text:span><text:span text:style-name="T9"> ciklusok implementálása, hasonlóan az </text:span><text:span text:style-name="Source_20_Text"><text:span text:style-name="T9">IfStatement</text:span></text:span><text:span text:style-name="T9">-hez, blokk-kezeléssel.</text:span></text:p>
        </text:list-item>
        <text:list-item>
          <text:p text:style-name="P67"><text:span text:style-name="T10">Funkciók:</text:span><text:span text:style-name="T9"> Saját funkciók definiálása (</text:span><text:span text:style-name="Source_20_Text"><text:span text:style-name="T9">function nev(arg1, arg2) ... endfunc</text:span></text:span><text:span text:style-name="T9">) és meghívása. Ez egy jelentős lépés, amihez "hívási verem" (Call Stack) és saját "scope" (hatókör) kezelés szükséges.</text:span></text:p>
        </text:list-item>
        <text:list-item>
          <text:p text:style-name="P67"><text:span text:style-name="T10">Logikai Operátorok:</text:span><text:span text:style-name="T9"> </text:span><text:span text:style-name="Source_20_Text"><text:span text:style-name="T9">and</text:span></text:span><text:span text:style-name="T9"> és </text:span><text:span text:style-name="Source_20_Text"><text:span text:style-name="T9">or</text:span></text:span><text:span text:style-name="T9"> operátorok bevezetése a feltételekbe.</text:span></text:p>
        </text:list-item>
        <text:list-item>
          <text:p text:style-name="P67"><text:span text:style-name="T10">Több Típus:</text:span><text:span text:style-name="T9"> </text:span><text:span text:style-name="Source_20_Text"><text:span text:style-name="T9">boolean</text:span></text:span><text:span text:style-name="T9"> (igaz/hamis) vagy </text:span><text:span text:style-name="Source_20_Text"><text:span text:style-name="T9">null</text:span></text:span><text:span text:style-name="T9"> típusok explicit bevezetése.</text:span></text:p>
        </text:list-item>
        <text:list-item>
          <text:p text:style-name="P72"><text:span text:style-name="T1">Tömbök/Listák:</text:span> Összetett adatstruktúrák kezelése.</text:p>
          <text:p text:style-name="P72"/>
        </text:list-item>
      </text:list>
      <text:p text:style-name="P37"><text:span text:style-name="T28">A szakdolgozatom</text:span><text:span text:style-name="T29">mal szerettem volna bemutatni</text:span><text:span text:style-name="T9">, hogy a szoftverfejlesztés absztrakcióinak megértéséhez néha a legjobb út az, ha mi magunk építjük fel azokat a legalapoktól, </text:span><text:span text:style-name="T29">mert így sokkal érthetőbb lesz majd a későbbiekben a választott programozási nyelv működése és szintaktikája is </text:span><text:span text:style-name="T30">illetve maga a programozás is</text:span><text:span text:style-name="T2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line-height="150%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499cm" fo:line-height="15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1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Alapértelmezett oldalstílus11"/><text:page-number text:select-page="current">17</text:page-number><text:bookmark-end text:name="PageNumWizard_FOOTER_Alapértelmezett oldalstílus1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16:01:13.656190570</meta:creation-date>
    <dc:date>2025-12-10T12:15:48.597312190</dc:date>
    <meta:editing-duration>PT3H16M35S</meta:editing-duration>
    <meta:editing-cycles>89</meta:editing-cycles>
    <meta:generator>LibreOffice/24.2.7.2$Linux_X86_64 LibreOffice_project/420$Build-2</meta:generator>
    <meta:document-statistic meta:table-count="1" meta:image-count="1" meta:object-count="0" meta:page-count="17" meta:paragraph-count="270" meta:word-count="2669" meta:character-count="19450" meta:non-whitespace-character-count="17017"/>
  </office:meta>
</office:document-meta>
</file>